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17459C4B5FF.png" manifest:media-type="image/png"/>
  <manifest:file-entry manifest:full-path="Pictures/100000010000044C0000007A92682D90.png" manifest:media-type="image/png"/>
  <manifest:file-entry manifest:full-path="Pictures/10000001000000650000006823622E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fffd7" draw:textarea-vertical-align="middle" draw:auto-grow-height="false" fo:min-height="3.994cm" fo:min-width="3.74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76cm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111111" draw:marker-start="" draw:marker-start-width="0.287cm" draw:marker-start-center="false" draw:marker-end="" draw:marker-end-width="0.287cm" draw:marker-end-center="false" draw:stroke-linejoin="miter" draw:fill="gradient" draw:fill-color="#ff9966" draw:fill-gradient-name="Gradient_20_275" draw:gradient-step-count="0" draw:textarea-horizontal-align="center" draw:textarea-vertical-align="middle" draw:auto-grow-height="false" draw:fit-to-size="false" style:shrink-to-fit="false" fo:min-height="2.415cm" fo:min-width="4.45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solid" draw:fill-color="#111111" draw:gradient-step-count="0" loext:fill-use-slide-background="false" draw:textarea-horizontal-align="center" draw:textarea-vertical-align="middle" draw:auto-grow-height="false" draw:fit-to-size="false" style:shrink-to-fit="false" fo:min-height="3.565cm" fo:min-width="4.60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7" style:family="paragraph">
      <loext:graphic-properties draw:fill="gradient" draw:fill-color="#ff9966" draw:fill-gradient-name="Gradient_20_275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9" style:family="paragraph">
      <loext:graphic-properties draw:fill="solid" draw:fill-color="#111111" draw:gradient-step-count="0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Comic Sans MS" fo:font-size="10pt" fo:font-weight="bold"/>
    </style:style>
    <style:style style:name="T2" style:family="text">
      <style:text-properties style:font-name="Comic Sans MS" fo:font-size="10pt" fo:font-weight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3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1" draw:layer="layout" svg:width="6cm" svg:height="6cm" svg:x="1.0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.457cm" svg:y="2.5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8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4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8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1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2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1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3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4.257cm" svg:y="2.5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7.857cm" svg:y="2.5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.457cm" svg:y="8.9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8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4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8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1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2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1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3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4.257cm" svg:y="8.9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7.857cm" svg:y="8.9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.457cm" svg:y="15.5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8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4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8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1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2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1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3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4.257cm" svg:y="15.5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1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16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18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19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19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19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18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7.857cm" svg:y="15.5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.457cm" svg:y="21.9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8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4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8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1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2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1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3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4.257cm" svg:y="21.9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22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25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25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25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26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24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7.857cm" svg:y="21.95cm">
            <text:p text:style-name="P8"><text:span text:style-name="T4">Frango Cremoso Com Milh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75" draw:display-name="Gradient 275" draw:style="axial" draw:start-color="#111111" draw:end-color="#111111" draw:start-intensity="100%" draw:end-intensity="100%" draw:angle="0deg" draw:border="0%">
      <loext:gradient-stop svg:offset="1" loext:color-type="rgb" loext:color-value="#111111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58:28.587443400</meta:creation-date>
    <dc:date>2026-02-01T21:01:11.306249900</dc:date>
    <meta:editing-duration>PT45M6S</meta:editing-duration>
    <meta:editing-cycles>12</meta:editing-cycles>
    <meta:generator>LibreOffice/25.8.4.2$Windows_X86_64 LibreOffice_project/290daaa01b999472f0c7a3890eb6a550fd74c6df</meta:generator>
    <meta:document-statistic meta:object-count="108"/>
  </office:meta>
</office:document-meta>
</file>