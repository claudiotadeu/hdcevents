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714cm" fo:min-width="4.518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5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6cm" svg:height="6cm" svg:x="1.0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.557cm" svg:y="2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4.457cm" svg:y="2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7.957cm" svg:y="2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.557cm" svg:y="8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4.457cm" svg:y="8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7.957cm" svg:y="8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.557cm" svg:y="15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4.457cm" svg:y="15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7.957cm" svg:y="15.5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.557cm" svg:y="21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9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5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9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2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3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2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4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14.457cm" svg:y="21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043cm" svg:height="4cm" svg:x="7.957cm" svg:y="21.9cm">
            <text:p text:style-name="P8"><text:span text:style-name="T4">A t u m <text:s text:c="3"/>T r o p i c a l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03:03.409010500</dc:date>
    <meta:editing-duration>PT52M24S</meta:editing-duration>
    <meta:editing-cycles>16</meta:editing-cycles>
    <meta:generator>LibreOffice/25.8.4.2$Windows_X86_64 LibreOffice_project/290daaa01b999472f0c7a3890eb6a550fd74c6df</meta:generator>
    <meta:document-statistic meta:object-count="108"/>
  </office:meta>
</office:document-meta>
</file>