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9F0000017459C4B5FF.png" manifest:media-type="image/png"/>
  <manifest:file-entry manifest:full-path="Pictures/100000010000044C0000007A92682D90.png" manifest:media-type="image/png"/>
  <manifest:file-entry manifest:full-path="Pictures/10000001000000650000006823622E01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Arial Narrow" svg:font-family="'Arial Narrow'" style:font-adornments="Negrito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fill="solid" draw:fill-color="#ffffd7" draw:textarea-vertical-align="middle" draw:auto-grow-height="false" fo:min-height="3.994cm" fo:min-width="3.744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90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776cm" loext:decorative="false"/>
      <style:paragraph-properties style:writing-mode="lr-tb"/>
    </style:style>
    <style:style style:name="gr6" style:family="graphic" style:parent-style-name="standard">
      <style:graphic-properties draw:stroke="none" svg:stroke-width="0.018cm" svg:stroke-color="#111111" draw:marker-start="" draw:marker-start-width="0.287cm" draw:marker-start-center="false" draw:marker-end="" draw:marker-end-width="0.287cm" draw:marker-end-center="false" draw:stroke-linejoin="miter" draw:fill="gradient" draw:fill-color="#ff9966" draw:fill-gradient-name="Gradient_20_275" draw:gradient-step-count="0" draw:textarea-horizontal-align="center" draw:textarea-vertical-align="middle" draw:auto-grow-height="false" draw:fit-to-size="false" style:shrink-to-fit="false" fo:min-height="2.415cm" fo:min-width="4.455cm" fo:padding-top="0.143cm" fo:padding-bottom="0.143cm" fo:padding-left="0.263cm" fo:padding-right="0.263cm" fo:wrap-option="wrap" draw:shadow="hidden" draw:shadow-offset-x="0cm" draw:shadow-offset-y="0.282cm" draw:shadow-color="#800080" draw:shadow-opacity="50%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width="0.053cm" svg:stroke-color="#800080" draw:marker-start="" draw:marker-start-width="0.339cm" draw:marker-start-center="false" draw:marker-end="" draw:marker-end-width="0.339cm" draw:marker-end-center="false" draw:stroke-linejoin="miter" draw:fill="solid" draw:fill-color="#111111" draw:gradient-step-count="0" loext:fill-use-slide-background="false" draw:textarea-horizontal-align="center" draw:textarea-vertical-align="middle" draw:auto-grow-height="false" draw:fit-to-size="false" style:shrink-to-fit="false" fo:min-height="3.865cm" fo:min-width="4.768cm" fo:padding-top="0.143cm" fo:padding-bottom="0.143cm" fo:padding-left="0.263cm" fo:padding-right="0.263cm" fo:wrap-option="wrap" draw:shadow="hidden" draw:shadow-offset-x="0cm" draw:shadow-offset-y="0.282cm" draw:shadow-color="#800080" draw:shadow-opacity="50%" style:writing-mode="lr-tb" loext:decorative="false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Comic Sans MS" fo:font-size="10pt" fo:font-weight="bold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style:font-name="Comic Sans MS" fo:font-size="10pt" fo:font-weight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15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P7" style:family="paragraph">
      <loext:graphic-properties draw:fill="gradient" draw:fill-color="#ff9966" draw:fill-gradient-name="Gradient_20_275" draw:gradient-step-count="0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15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P9" style:family="paragraph">
      <loext:graphic-properties draw:fill="solid" draw:fill-color="#111111" draw:gradient-step-count="0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T1" style:family="text">
      <style:text-properties style:font-name="Comic Sans MS" fo:font-size="10pt" fo:font-weight="bold"/>
    </style:style>
    <style:style style:name="T2" style:family="text">
      <style:text-properties style:font-name="Comic Sans MS" fo:font-size="10pt" fo:font-weight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15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13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 draw:style-name="gr1">
          <draw:custom-shape draw:style-name="gr2" draw:text-style-name="P1" draw:layer="layout" svg:width="6cm" svg:height="6cm" svg:x="1.05cm" svg:y="2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1.6cm" svg:y="3.1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1.08cm" svg:y="5.7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3.353cm" svg:y="6.2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2.426cm" svg:y="6.3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3.353cm" svg:y="6.6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1.55cm" svg:y="5.1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293cm" svg:height="4.15cm" svg:x="1.457cm" svg:y="2.45cm">
            <text:p text:style-name="P8"><text:span text:style-name="T4">R i c o t a <text:s text:c="2"/>C o m <text:s text:c="2"/>E r v a s 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  <draw:g draw:style-name="gr1">
          <draw:custom-shape draw:style-name="gr2" draw:text-style-name="P1" draw:layer="layout" svg:width="6cm" svg:height="6cm" svg:x="13.95cm" svg:y="2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14.5cm" svg:y="3.1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13.98cm" svg:y="5.7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16.253cm" svg:y="6.2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15.326cm" svg:y="6.3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16.253cm" svg:y="6.6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14.45cm" svg:y="5.1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293cm" svg:height="4.15cm" svg:x="14.357cm" svg:y="2.45cm">
            <text:p text:style-name="P8"><text:span text:style-name="T4">R i c o t a <text:s text:c="2"/>C o m <text:s text:c="2"/>E r v a s 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  <draw:g draw:style-name="gr1">
          <draw:custom-shape draw:style-name="gr2" draw:text-style-name="P1" draw:layer="layout" svg:width="6cm" svg:height="6cm" svg:x="7.45cm" svg:y="2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8cm" svg:y="3.1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7.48cm" svg:y="5.7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9.753cm" svg:y="6.2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8.826cm" svg:y="6.3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9.753cm" svg:y="6.6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7.95cm" svg:y="5.1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293cm" svg:height="4.15cm" svg:x="7.857cm" svg:y="2.45cm">
            <text:p text:style-name="P8"><text:span text:style-name="T4">R i c o t a <text:s text:c="2"/>C o m <text:s text:c="2"/>E r v a s 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  <draw:g draw:style-name="gr1">
          <draw:custom-shape draw:style-name="gr2" draw:text-style-name="P1" draw:layer="layout" svg:width="6cm" svg:height="6cm" svg:x="1.05cm" svg:y="8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1.6cm" svg:y="9.5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1.08cm" svg:y="12.1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3.353cm" svg:y="12.6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2.426cm" svg:y="12.7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3.353cm" svg:y="13.0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1.55cm" svg:y="11.5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293cm" svg:height="4.15cm" svg:x="1.457cm" svg:y="8.85cm">
            <text:p text:style-name="P8"><text:span text:style-name="T4">R i c o t a <text:s text:c="2"/>C o m <text:s text:c="2"/>E r v a s 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  <draw:g draw:style-name="gr1">
          <draw:custom-shape draw:style-name="gr2" draw:text-style-name="P1" draw:layer="layout" svg:width="6cm" svg:height="6cm" svg:x="13.95cm" svg:y="8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14.5cm" svg:y="9.5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13.98cm" svg:y="12.1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16.253cm" svg:y="12.6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15.326cm" svg:y="12.7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16.253cm" svg:y="13.0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14.45cm" svg:y="11.5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293cm" svg:height="4.15cm" svg:x="14.357cm" svg:y="8.85cm">
            <text:p text:style-name="P8"><text:span text:style-name="T4">R i c o t a <text:s text:c="2"/>C o m <text:s text:c="2"/>E r v a s 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  <draw:g draw:style-name="gr1">
          <draw:custom-shape draw:style-name="gr2" draw:text-style-name="P1" draw:layer="layout" svg:width="6cm" svg:height="6cm" svg:x="7.45cm" svg:y="8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8cm" svg:y="9.5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7.48cm" svg:y="12.1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9.753cm" svg:y="12.6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8.826cm" svg:y="12.7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9.753cm" svg:y="13.0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7.95cm" svg:y="11.5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293cm" svg:height="4.15cm" svg:x="7.857cm" svg:y="8.85cm">
            <text:p text:style-name="P8"><text:span text:style-name="T4">R i c o t a <text:s text:c="2"/>C o m <text:s text:c="2"/>E r v a s 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  <draw:g draw:style-name="gr1">
          <draw:custom-shape draw:style-name="gr2" draw:text-style-name="P1" draw:layer="layout" svg:width="6cm" svg:height="6cm" svg:x="1.05cm" svg:y="15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1.6cm" svg:y="16.1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1.08cm" svg:y="18.7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3.353cm" svg:y="19.2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2.426cm" svg:y="19.3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3.353cm" svg:y="19.6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1.55cm" svg:y="18.1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293cm" svg:height="4.15cm" svg:x="1.457cm" svg:y="15.45cm">
            <text:p text:style-name="P8"><text:span text:style-name="T4">R i c o t a <text:s text:c="2"/>C o m <text:s text:c="2"/>E r v a s 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  <draw:g draw:style-name="gr1">
          <draw:custom-shape draw:style-name="gr2" draw:text-style-name="P1" draw:layer="layout" svg:width="6cm" svg:height="6cm" svg:x="13.95cm" svg:y="15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14.5cm" svg:y="16.1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13.98cm" svg:y="18.7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16.253cm" svg:y="19.2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15.326cm" svg:y="19.3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16.253cm" svg:y="19.6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14.45cm" svg:y="18.1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293cm" svg:height="4.15cm" svg:x="14.357cm" svg:y="15.45cm">
            <text:p text:style-name="P8"><text:span text:style-name="T4">R i c o t a <text:s text:c="2"/>C o m <text:s text:c="2"/>E r v a s 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  <draw:g draw:style-name="gr1">
          <draw:custom-shape draw:style-name="gr2" draw:text-style-name="P1" draw:layer="layout" svg:width="6cm" svg:height="6cm" svg:x="7.45cm" svg:y="15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8cm" svg:y="16.1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7.48cm" svg:y="18.7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9.753cm" svg:y="19.2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8.826cm" svg:y="19.3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9.753cm" svg:y="19.6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7.95cm" svg:y="18.1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293cm" svg:height="4.15cm" svg:x="7.857cm" svg:y="15.45cm">
            <text:p text:style-name="P8"><text:span text:style-name="T4">R i c o t a <text:s text:c="2"/>C o m <text:s text:c="2"/>E r v a s 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  <draw:g draw:style-name="gr1">
          <draw:custom-shape draw:style-name="gr2" draw:text-style-name="P1" draw:layer="layout" svg:width="6cm" svg:height="6cm" svg:x="1.05cm" svg:y="2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1.6cm" svg:y="22.5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1.08cm" svg:y="25.1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3.353cm" svg:y="25.6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2.426cm" svg:y="25.7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3.353cm" svg:y="26.0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1.55cm" svg:y="24.5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293cm" svg:height="4.15cm" svg:x="1.457cm" svg:y="21.85cm">
            <text:p text:style-name="P8"><text:span text:style-name="T4">R i c o t a <text:s text:c="2"/>C o m <text:s text:c="2"/>E r v a s 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  <draw:g draw:style-name="gr1">
          <draw:custom-shape draw:style-name="gr2" draw:text-style-name="P1" draw:layer="layout" svg:width="6cm" svg:height="6cm" svg:x="13.95cm" svg:y="2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14.5cm" svg:y="22.5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13.98cm" svg:y="25.1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16.253cm" svg:y="25.6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15.326cm" svg:y="25.7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16.253cm" svg:y="26.0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14.45cm" svg:y="24.5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293cm" svg:height="4.15cm" svg:x="14.357cm" svg:y="21.85cm">
            <text:p text:style-name="P8"><text:span text:style-name="T4">R i c o t a <text:s text:c="2"/>C o m <text:s text:c="2"/>E r v a s 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  <draw:g draw:style-name="gr1">
          <draw:custom-shape draw:style-name="gr2" draw:text-style-name="P1" draw:layer="layout" svg:width="6cm" svg:height="6cm" svg:x="7.45cm" svg:y="2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8cm" svg:y="22.5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7.48cm" svg:y="25.1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9.753cm" svg:y="25.6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8.826cm" svg:y="25.7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9.753cm" svg:y="26.0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7.95cm" svg:y="24.5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293cm" svg:height="4.15cm" svg:x="7.857cm" svg:y="21.85cm">
            <text:p text:style-name="P8"><text:span text:style-name="T4">R i c o t a <text:s text:c="2"/>C o m <text:s text:c="2"/>E r v a s 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Arial Narrow" svg:font-family="'Arial Narrow'" style:font-adornments="Negrito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275" draw:display-name="Gradient 275" draw:style="axial" draw:start-color="#111111" draw:end-color="#111111" draw:start-intensity="100%" draw:end-intensity="100%" draw:angle="0deg" draw:border="0%">
      <loext:gradient-stop svg:offset="1" loext:color-type="rgb" loext:color-value="#111111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7T21:58:28.587443400</meta:creation-date>
    <dc:date>2026-02-01T21:05:13.735353500</dc:date>
    <meta:editing-duration>PT53M10S</meta:editing-duration>
    <meta:editing-cycles>15</meta:editing-cycles>
    <meta:generator>LibreOffice/25.8.4.2$Windows_X86_64 LibreOffice_project/290daaa01b999472f0c7a3890eb6a550fd74c6df</meta:generator>
    <meta:document-statistic meta:object-count="108"/>
  </office:meta>
</office:document-meta>
</file>