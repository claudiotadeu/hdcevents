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17459C4B5FF.png" manifest:media-type="image/png"/>
  <manifest:file-entry manifest:full-path="Pictures/100000010000044C0000007A92682D90.png" manifest:media-type="image/png"/>
  <manifest:file-entry manifest:full-path="Pictures/10000001000000650000006823622E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vertical-align="middle" draw:auto-grow-height="false" fo:min-height="3.994cm" fo:min-width="3.74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76cm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111111" draw:marker-start="" draw:marker-start-width="0.287cm" draw:marker-start-center="false" draw:marker-end="" draw:marker-end-width="0.287cm" draw:marker-end-center="false" draw:stroke-linejoin="miter" draw:fill="gradient" draw:fill-color="#ff9966" draw:fill-gradient-name="Gradient_20_275" draw:gradient-step-count="0" draw:textarea-horizontal-align="center" draw:textarea-vertical-align="middle" draw:auto-grow-height="false" draw:fit-to-size="false" style:shrink-to-fit="false" fo:min-height="2.415cm" fo:min-width="4.45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solid" draw:fill-color="#111111" draw:gradient-step-count="0" loext:fill-use-slide-background="false" draw:textarea-horizontal-align="center" draw:textarea-vertical-align="middle" draw:auto-grow-height="false" draw:fit-to-size="false" style:shrink-to-fit="false" fo:min-height="3.565cm" fo:min-width="4.605cm" fo:padding-top="0.143cm" fo:padding-bottom="0.143cm" fo:padding-left="0.263cm" fo:padding-right="0.263cm" fo:wrap-option="wrap" draw:shadow="hidden" draw:shadow-offset-x="0cm" draw:shadow-offset-y="0.282cm" draw:shadow-color="#800080" draw:shadow-opacity="50%" style:writing-mode="lr-tb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Comic Sans MS" fo:font-size="10pt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loext:graphic-properties draw:fill="gradient" draw:fill-color="#ff9966" draw:fill-gradient-name="Gradient_20_27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9" style:family="paragraph">
      <loext:graphic-properties draw:fill="solid" draw:fill-color="#111111" draw:gradient-step-count="0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Comic Sans MS" fo:font-size="10pt" fo:font-weight="bold"/>
    </style:style>
    <style:style style:name="T2" style:family="text">
      <style:text-properties style:font-name="Comic Sans MS" fo:font-size="10pt" fo:font-weight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3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g draw:style-name="gr1">
            <draw:custom-shape draw:style-name="gr2" draw:text-style-name="P1" draw:layer="layout" svg:width="6cm" svg:height="6cm" svg:x="1.0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2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2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2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8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9.5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12.1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12.6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12.7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13.0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11.5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8.9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8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9.5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12.1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12.6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12.7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13.0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11.5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8.9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8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9.5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12.1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12.6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12.7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13.0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11.5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8.9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2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2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2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3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5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6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6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6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5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2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15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15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15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21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22.5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25.1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25.6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25.7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26.0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24.5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21.9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21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22.5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25.1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25.6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25.7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26.0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24.5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21.9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21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22.5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25.1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25.6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25.7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26.0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24.5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21.9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.0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.6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.0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3.3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2.4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3.3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.5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.457cm" svg:y="15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13.8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14.4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13.8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16.1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15.2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16.1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14.3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14.257cm" svg:y="15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  <draw:g draw:style-name="gr1">
            <draw:custom-shape draw:style-name="gr2" draw:text-style-name="P1" draw:layer="layout" svg:width="6cm" svg:height="6cm" svg:x="7.45cm" svg:y="15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4.975cm" svg:height="2.757cm" svg:x="8cm" svg:y="16.1cm">
              <draw:image xlink:href="Pictures/100000010000029F0000017459C4B5FF.png" xlink:type="simple" xlink:show="embed" xlink:actuate="onLoad" draw:mime-type="image/png">
                <text:p/>
              </draw:image>
            </draw:frame>
            <draw:frame draw:style-name="gr3" draw:text-style-name="P2" draw:layer="layout" svg:width="5.85cm" svg:height="0.647cm" svg:x="7.48cm" svg:y="18.7cm">
              <draw:image xlink:href="Pictures/100000010000044C0000007A92682D90.png" xlink:type="simple" xlink:show="embed" xlink:actuate="onLoad" draw:mime-type="image/png">
                <text:p/>
              </draw:image>
            </draw:frame>
            <draw:frame draw:style-name="gr4" draw:text-style-name="P4" draw:layer="layout" svg:width="2.404cm" svg:height="0.738cm" svg:x="9.753cm" svg:y="19.217cm">
              <draw:text-box>
                <text:p text:style-name="P3"><text:span text:style-name="T1">__/__/___</text:span></text:p>
              </draw:text-box>
            </draw:frame>
            <draw:frame draw:style-name="gr3" draw:text-style-name="P2" draw:layer="layout" svg:width="1.066cm" svg:height="0.95cm" svg:x="8.826cm" svg:y="19.3cm">
              <draw:image xlink:href="Pictures/10000001000000650000006823622E01.png" xlink:type="simple" xlink:show="embed" xlink:actuate="onLoad" draw:mime-type="image/png">
                <text:p/>
              </draw:image>
            </draw:frame>
            <draw:frame draw:style-name="gr5" draw:text-style-name="P5" draw:layer="layout" svg:width="2.276cm" svg:height="0.738cm" svg:x="9.753cm" svg:y="19.638cm">
              <draw:text-box>
                <text:p text:style-name="P3"><text:span text:style-name="T2">Fabricação</text:span></text:p>
              </draw:text-box>
            </draw:frame>
            <draw:custom-shape draw:style-name="gr6" draw:text-style-name="P7" draw:layer="layout" svg:width="4.98cm" svg:height="2.7cm" svg:x="7.95cm" svg:y="18.15cm">
              <text:p text:style-name="P6"><text:span text:style-name="T3">Válido <text:s/>por <text:s/>5 <text:s/>dias <text:s/>após <text:s/>a <text:s text:c="2"/>Fabricação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0.141474805772445 7493.8126536226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    </draw:enhanced-geometry>
            </draw:custom-shape>
            <draw:custom-shape draw:style-name="gr7" draw:text-style-name="P9" draw:layer="layout" svg:width="5.13cm" svg:height="3.85cm" svg:x="7.857cm" svg:y="15.55cm">
              <text:p text:style-name="P8"><text:span text:style-name="T4">P e i t o <text:s text:c="2"/>d e <text:s text:c="2"/>P e r u <text:s text:c="2"/>R e a l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handle draw:handle-polar="10800 10800" draw:handle-polar-pole-x="10800" draw:handle-polar-pole-y="10800" draw:handle-position="10800 $0" draw:handle-polar-radius="10800" draw:handle-polar-angle="$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Narrow" svg:font-family="'Arial Narrow'" style:font-adornments="Negrito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5" draw:display-name="Gradient 275" draw:style="axial" draw:start-color="#111111" draw:end-color="#111111" draw:start-intensity="100%" draw:end-intensity="100%" draw:angle="0deg" draw:border="0%">
      <loext:gradient-stop svg:offset="1" loext:color-type="rgb" loext:color-value="#111111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58:28.587443400</meta:creation-date>
    <dc:date>2026-02-01T20:59:03.195926500</dc:date>
    <meta:editing-duration>PT47M23S</meta:editing-duration>
    <meta:editing-cycles>15</meta:editing-cycles>
    <meta:generator>LibreOffice/25.8.4.2$Windows_X86_64 LibreOffice_project/290daaa01b999472f0c7a3890eb6a550fd74c6df</meta:generator>
    <meta:document-statistic meta:object-count="163"/>
  </office:meta>
</office:document-meta>
</file>