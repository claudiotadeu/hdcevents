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9F0000017459C4B5FF.png" manifest:media-type="image/png"/>
  <manifest:file-entry manifest:full-path="Pictures/100000010000044C0000007A92682D90.png" manifest:media-type="image/png"/>
  <manifest:file-entry manifest:full-path="Pictures/10000001000000650000006823622E01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b66c" draw:textarea-horizontal-align="justify" draw:textarea-vertical-align="middle" draw:auto-grow-height="false" fo:min-height="3.6cm" fo:min-width="0.6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5.65cm" fo:min-width="6.5cm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5.89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90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77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 loext:decorative="false"/>
      <style:paragraph-properties style:writing-mode="lr-tb"/>
    </style:style>
    <style:style style:name="P1" style:family="paragraph">
      <loext:graphic-properties draw:fill="solid" draw:fill-color="#ffb66c"/>
      <style:paragraph-properties fo:margin-left="0cm" fo:margin-right="0cm" fo:text-align="center" fo:text-indent="0cm"/>
    </style:style>
    <style:style style:name="P2" style:family="paragraph">
      <loext:graphic-properties draw:fill="none"/>
      <style:paragraph-properties fo:margin-left="0cm" fo:margin-right="0cm" fo:text-align="center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style:font-name="Comic Sans MS" fo:font-size="14pt" fo:font-weight="bold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Comic Sans MS" fo:font-size="10pt" fo:font-weight="bold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style:font-name="Comic Sans MS" fo:font-size="10pt" fo:font-weight="normal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text-align="center" fo:text-indent="0cm"/>
      <style:text-properties style:font-name="Comic Sans MS" fo:font-size="13pt" fo:font-weight="bold"/>
    </style:style>
    <style:style style:name="T1" style:family="text">
      <style:text-properties style:font-name="Comic Sans MS" fo:font-size="14pt" fo:font-weight="bold"/>
    </style:style>
    <style:style style:name="T2" style:family="text">
      <style:text-properties style:font-name="Comic Sans MS" fo:font-size="10pt" fo:font-weight="bold"/>
    </style:style>
    <style:style style:name="T3" style:family="text">
      <style:text-properties style:font-name="Comic Sans MS" fo:font-size="10pt" fo:font-weight="normal"/>
    </style:style>
    <style:style style:name="T4" style:family="text">
      <style:text-properties style:font-name="Comic Sans MS" fo:font-size="13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.1cm" svg:height="3.85cm" svg:x="12.95cm" svg:y="22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7cm" svg:height="5.9cm" svg:x="7.05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3" draw:layer="layout" svg:width="6.094cm" svg:height="3.379cm" svg:x="7.55cm" svg:y="0.771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4" draw:text-style-name="P3" draw:layer="layout" svg:width="7.15cm" svg:height="0.792cm" svg:x="7cm" svg:y="3.957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5" draw:text-style-name="P5" draw:layer="layout" svg:width="6.397cm" svg:height="0.941cm" svg:x="7.5cm" svg:y="-0.056cm">
            <draw:text-box>
              <text:p text:style-name="P4"><text:span text:style-name="T1">Frango Cremoso C Molho</text:span></text:p>
            </draw:text-box>
          </draw:frame>
          <draw:frame draw:style-name="gr4" draw:text-style-name="P3" draw:layer="layout" svg:width="1.15cm" svg:height="1.184cm" svg:x="7cm" svg:y="4.688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6" draw:text-style-name="P6" draw:layer="layout" svg:width="2.404cm" svg:height="0.738cm" svg:x="8cm" svg:y="4.709cm">
            <draw:text-box>
              <text:p text:style-name="P4"><text:span text:style-name="T2">__/__/___</text:span></text:p>
            </draw:text-box>
          </draw:frame>
          <draw:frame draw:style-name="gr7" draw:text-style-name="P7" draw:layer="layout" svg:width="2.276cm" svg:height="0.738cm" svg:x="8cm" svg:y="5.109cm">
            <draw:text-box>
              <text:p text:style-name="P4"><text:span text:style-name="T3">Fabricação</text:span></text:p>
            </draw:text-box>
          </draw:frame>
          <draw:frame draw:style-name="gr8" draw:text-style-name="P7" draw:layer="layout" svg:width="3.389cm" svg:height="1.225cm" svg:x="10.8cm" svg:y="4.609cm">
            <draw:text-box>
              <text:p text:style-name="P4"><text:span text:style-name="T3">Válido por 5 dias </text:span></text:p>
              <text:p text:style-name="P4"><text:span text:style-name="T3">após a Fabricação</text:span></text:p>
            </draw:text-box>
          </draw:frame>
        </draw:g>
        <draw:custom-shape draw:style-name="gr3" draw:text-style-name="P2" draw:layer="layout" svg:width="7cm" svg:height="5.9cm" svg:x="7.051cm" svg:y="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5.938cm" svg:height="3.291cm" svg:x="7.062cm" svg:y="22.3cm">
          <draw:image xlink:href="Pictures/100000010000029F0000017459C4B5FF.png" xlink:type="simple" xlink:show="embed" xlink:actuate="onLoad" draw:mime-type="image/png">
            <text:p/>
          </draw:image>
        </draw:frame>
        <draw:frame draw:style-name="gr4" draw:text-style-name="P3" draw:layer="layout" svg:width="7.15cm" svg:height="0.792cm" svg:x="7.001cm" svg:y="25.757cm">
          <draw:image xlink:href="Pictures/100000010000044C0000007A92682D90.png" xlink:type="simple" xlink:show="embed" xlink:actuate="onLoad" draw:mime-type="image/png">
            <text:p/>
          </draw:image>
        </draw:frame>
        <draw:frame draw:style-name="gr9" draw:text-style-name="P9" draw:layer="layout" svg:width="4.001cm" svg:height="1.521cm" draw:transform="rotate (-1.5695745963185) translate (14.288cm 21.999cm)">
          <draw:text-box>
            <text:p text:style-name="P8"><text:span text:style-name="T4">Frango Cremoso Com Milho</text:span></text:p>
          </draw:text-box>
        </draw:frame>
        <draw:frame draw:style-name="gr4" draw:text-style-name="P3" draw:layer="layout" svg:width="1.15cm" svg:height="1.184cm" svg:x="7.001cm" svg:y="26.688cm">
          <draw:image xlink:href="Pictures/10000001000000650000006823622E01.png" xlink:type="simple" xlink:show="embed" xlink:actuate="onLoad" draw:mime-type="image/png">
            <text:p/>
          </draw:image>
        </draw:frame>
        <draw:frame draw:style-name="gr6" draw:text-style-name="P6" draw:layer="layout" svg:width="2.404cm" svg:height="0.738cm" svg:x="8.001cm" svg:y="26.709cm">
          <draw:text-box>
            <text:p text:style-name="P4"><text:span text:style-name="T2">__/__/___</text:span></text:p>
          </draw:text-box>
        </draw:frame>
        <draw:frame draw:style-name="gr7" draw:text-style-name="P7" draw:layer="layout" svg:width="2.276cm" svg:height="0.738cm" svg:x="8.001cm" svg:y="27.109cm">
          <draw:text-box>
            <text:p text:style-name="P4"><text:span text:style-name="T3">Fabricação</text:span></text:p>
          </draw:text-box>
        </draw:frame>
        <draw:frame draw:style-name="gr8" draw:text-style-name="P7" draw:layer="layout" svg:width="3.389cm" svg:height="1.225cm" svg:x="10.801cm" svg:y="26.609cm">
          <draw:text-box>
            <text:p text:style-name="P4"><text:span text:style-name="T3">Válido por 5 dias </text:span></text:p>
            <text:p text:style-name="P4"><text:span text:style-name="T3">após a Fabricaçã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7T21:58:28.587443400</meta:creation-date>
    <dc:date>2026-01-27T22:31:56.628890900</dc:date>
    <meta:editing-duration>PT33M26S</meta:editing-duration>
    <meta:editing-cycles>8</meta:editing-cycles>
    <meta:generator>LibreOffice/25.8.4.2$Windows_X86_64 LibreOffice_project/290daaa01b999472f0c7a3890eb6a550fd74c6df</meta:generator>
    <meta:document-statistic meta:object-count="18"/>
  </office:meta>
</office:document-meta>
</file>