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9F0000017459C4B5FF.png" manifest:media-type="image/png"/>
  <manifest:file-entry manifest:full-path="Pictures/100000010000044C0000007A92682D90.png" manifest:media-type="image/png"/>
  <manifest:file-entry manifest:full-path="Pictures/10000001000000650000006823622E01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Arial Narrow" svg:font-family="'Arial Narrow'" style:font-adornments="Negrito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fill="solid" draw:fill-color="#ffffd7" draw:textarea-vertical-align="middle" draw:auto-grow-height="false" fo:min-height="3.994cm" fo:min-width="3.744cm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.904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.776cm" loext:decorative="false"/>
      <style:paragraph-properties style:writing-mode="lr-tb"/>
    </style:style>
    <style:style style:name="gr6" style:family="graphic" style:parent-style-name="standard">
      <style:graphic-properties draw:stroke="none" svg:stroke-width="0.018cm" svg:stroke-color="#111111" draw:marker-start="" draw:marker-start-width="0.287cm" draw:marker-start-center="false" draw:marker-end="" draw:marker-end-width="0.287cm" draw:marker-end-center="false" draw:stroke-linejoin="miter" draw:fill="gradient" draw:fill-color="#ff9966" draw:fill-gradient-name="Gradient_20_275" draw:gradient-step-count="0" draw:textarea-horizontal-align="center" draw:textarea-vertical-align="middle" draw:auto-grow-height="false" draw:fit-to-size="false" style:shrink-to-fit="false" fo:min-height="2.415cm" fo:min-width="4.455cm" fo:padding-top="0.143cm" fo:padding-bottom="0.143cm" fo:padding-left="0.263cm" fo:padding-right="0.263cm" fo:wrap-option="wrap" draw:shadow="hidden" draw:shadow-offset-x="0cm" draw:shadow-offset-y="0.282cm" draw:shadow-color="#800080" draw:shadow-opacity="50%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width="0.053cm" svg:stroke-color="#800080" draw:marker-start="" draw:marker-start-width="0.339cm" draw:marker-start-center="false" draw:marker-end="" draw:marker-end-width="0.339cm" draw:marker-end-center="false" draw:stroke-linejoin="miter" draw:fill="solid" draw:fill-color="#111111" draw:gradient-step-count="0" loext:fill-use-slide-background="false" draw:textarea-horizontal-align="center" draw:textarea-vertical-align="middle" draw:auto-grow-height="false" draw:fit-to-size="false" style:shrink-to-fit="false" fo:min-height="3.565cm" fo:min-width="4.605cm" fo:padding-top="0.143cm" fo:padding-bottom="0.143cm" fo:padding-left="0.263cm" fo:padding-right="0.263cm" fo:wrap-option="wrap" draw:shadow="hidden" draw:shadow-offset-x="0cm" draw:shadow-offset-y="0.282cm" draw:shadow-color="#800080" draw:shadow-opacity="50%" style:writing-mode="lr-tb" loext:decorative="false"/>
      <style:paragraph-properties style:writing-mode="lr-tb"/>
    </style:style>
    <style:style style:name="P1" style:family="paragraph">
      <loext:graphic-properties draw:fill="solid" draw:fill-color="#ffffd7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style:font-name="Comic Sans MS" fo:font-size="10pt" fo:font-weight="bold"/>
    </style:style>
    <style:style style:name="P5" style:family="paragraph">
      <loext:graphic-properties draw:fill="none" draw:fill-color="#ffffff"/>
      <style:paragraph-properties fo:margin-left="0cm" fo:margin-right="0cm" fo:text-indent="0cm"/>
      <style:text-properties style:font-name="Comic Sans MS" fo:font-size="10pt" fo:font-weight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size="15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50%" style:font-relief="none" style:text-overline-style="none" style:text-overline-color="font-color"/>
    </style:style>
    <style:style style:name="P7" style:family="paragraph">
      <loext:graphic-properties draw:fill="gradient" draw:fill-color="#ff9966" draw:fill-gradient-name="Gradient_20_275" draw:gradient-step-count="0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size="15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50%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50%" style:font-relief="none" style:text-overline-style="none" style:text-overline-color="font-color"/>
    </style:style>
    <style:style style:name="P9" style:family="paragraph">
      <loext:graphic-properties draw:fill="solid" draw:fill-color="#111111" draw:gradient-step-count="0"/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50%" style:font-relief="none" style:text-overline-style="none" style:text-overline-color="font-color"/>
    </style:style>
    <style:style style:name="T1" style:family="text">
      <style:text-properties style:font-name="Comic Sans MS" fo:font-size="10pt" fo:font-weight="bold"/>
    </style:style>
    <style:style style:name="T2" style:family="text">
      <style:text-properties style:font-name="Comic Sans MS" fo:font-size="10pt" fo:font-weight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size="15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50%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Black" fo:font-size="13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5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 draw:style-name="gr1">
          <draw:g draw:style-name="gr1">
            <draw:custom-shape draw:style-name="gr2" draw:text-style-name="P1" draw:layer="layout" svg:width="6cm" svg:height="6cm" svg:x="1.05cm" svg:y="2.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" draw:text-style-name="P2" draw:layer="layout" svg:width="4.975cm" svg:height="2.757cm" svg:x="1.6cm" svg:y="3.1cm">
              <draw:image xlink:href="Pictures/100000010000029F0000017459C4B5FF.png" xlink:type="simple" xlink:show="embed" xlink:actuate="onLoad" draw:mime-type="image/png">
                <text:p/>
              </draw:image>
            </draw:frame>
            <draw:frame draw:style-name="gr3" draw:text-style-name="P2" draw:layer="layout" svg:width="5.85cm" svg:height="0.647cm" svg:x="1.08cm" svg:y="5.7cm">
              <draw:image xlink:href="Pictures/100000010000044C0000007A92682D90.png" xlink:type="simple" xlink:show="embed" xlink:actuate="onLoad" draw:mime-type="image/png">
                <text:p/>
              </draw:image>
            </draw:frame>
            <draw:frame draw:style-name="gr4" draw:text-style-name="P4" draw:layer="layout" svg:width="2.404cm" svg:height="0.738cm" svg:x="3.353cm" svg:y="6.217cm">
              <draw:text-box>
                <text:p text:style-name="P3"><text:span text:style-name="T1">__/__/___</text:span></text:p>
              </draw:text-box>
            </draw:frame>
            <draw:frame draw:style-name="gr3" draw:text-style-name="P2" draw:layer="layout" svg:width="1.066cm" svg:height="0.95cm" svg:x="2.426cm" svg:y="6.3cm">
              <draw:image xlink:href="Pictures/10000001000000650000006823622E01.png" xlink:type="simple" xlink:show="embed" xlink:actuate="onLoad" draw:mime-type="image/png">
                <text:p/>
              </draw:image>
            </draw:frame>
            <draw:frame draw:style-name="gr5" draw:text-style-name="P5" draw:layer="layout" svg:width="2.276cm" svg:height="0.738cm" svg:x="3.353cm" svg:y="6.638cm">
              <draw:text-box>
                <text:p text:style-name="P3"><text:span text:style-name="T2">Fabricação</text:span></text:p>
              </draw:text-box>
            </draw:frame>
            <draw:custom-shape draw:style-name="gr6" draw:text-style-name="P7" draw:layer="layout" svg:width="4.98cm" svg:height="2.7cm" svg:x="1.55cm" svg:y="5.15cm">
              <text:p text:style-name="P6"><text:span text:style-name="T3">Válido <text:s/>por <text:s/>5 <text:s/>dias <text:s/>após <text:s/>a <text:s text:c="2"/>Fabricação</text:span></text:p>
  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-0.141474805772445 7493.81265362266" draw:enhanced-path="A ?f5 ?f5 ?f11 ?f11 ?f10 ?f9 ?f8 ?f9 N A 0 0 21600 21600 ?f4 ?f3 ?f2 ?f3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?f5 *cos($0 *(pi/180))"/>
                <draw:equation draw:name="f7" draw:formula="?f5 *sin($0 *(pi/180))"/>
                <draw:equation draw:name="f8" draw:formula="?f6 +10800"/>
                <draw:equation draw:name="f9" draw:formula="?f7 +10800"/>
                <draw:equation draw:name="f10" draw:formula="21600-?f8 "/>
                <draw:equation draw:name="f11" draw:formula="21600-?f5 "/>
                <draw:handle draw:handle-radius-range-minimum="0" draw:handle-radius-range-maximum="10800" draw:handle-polar="10800 10800" draw:handle-polar-pole-x="10800" draw:handle-polar-pole-y="10800" draw:handle-position="$1 $0" draw:handle-polar-radius="$1" draw:handle-polar-angle="$0"/>
              </draw:enhanced-geometry>
            </draw:custom-shape>
            <draw:custom-shape draw:style-name="gr7" draw:text-style-name="P9" draw:layer="layout" svg:width="5.13cm" svg:height="3.85cm" svg:x="1.457cm" svg:y="2.65cm">
              <text:p text:style-name="P8"><text:span text:style-name="T4">S a l a d a <text:s text:c="2"/>T r o p i c a l</text:span></text:p>
  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handle draw:handle-polar="10800 10800" draw:handle-polar-pole-x="10800" draw:handle-polar-pole-y="10800" draw:handle-position="10800 $0" draw:handle-polar-radius="10800" draw:handle-polar-angle="$0"/>
              </draw:enhanced-geometry>
            </draw:custom-shape>
          </draw:g>
          <draw:g draw:style-name="gr1">
            <draw:custom-shape draw:style-name="gr2" draw:text-style-name="P1" draw:layer="layout" svg:width="6cm" svg:height="6cm" svg:x="13.85cm" svg:y="2.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" draw:text-style-name="P2" draw:layer="layout" svg:width="4.975cm" svg:height="2.757cm" svg:x="14.4cm" svg:y="3.1cm">
              <draw:image xlink:href="Pictures/100000010000029F0000017459C4B5FF.png" xlink:type="simple" xlink:show="embed" xlink:actuate="onLoad" draw:mime-type="image/png">
                <text:p/>
              </draw:image>
            </draw:frame>
            <draw:frame draw:style-name="gr3" draw:text-style-name="P2" draw:layer="layout" svg:width="5.85cm" svg:height="0.647cm" svg:x="13.88cm" svg:y="5.7cm">
              <draw:image xlink:href="Pictures/100000010000044C0000007A92682D90.png" xlink:type="simple" xlink:show="embed" xlink:actuate="onLoad" draw:mime-type="image/png">
                <text:p/>
              </draw:image>
            </draw:frame>
            <draw:frame draw:style-name="gr4" draw:text-style-name="P4" draw:layer="layout" svg:width="2.404cm" svg:height="0.738cm" svg:x="16.153cm" svg:y="6.217cm">
              <draw:text-box>
                <text:p text:style-name="P3"><text:span text:style-name="T1">__/__/___</text:span></text:p>
              </draw:text-box>
            </draw:frame>
            <draw:frame draw:style-name="gr3" draw:text-style-name="P2" draw:layer="layout" svg:width="1.066cm" svg:height="0.95cm" svg:x="15.226cm" svg:y="6.3cm">
              <draw:image xlink:href="Pictures/10000001000000650000006823622E01.png" xlink:type="simple" xlink:show="embed" xlink:actuate="onLoad" draw:mime-type="image/png">
                <text:p/>
              </draw:image>
            </draw:frame>
            <draw:frame draw:style-name="gr5" draw:text-style-name="P5" draw:layer="layout" svg:width="2.276cm" svg:height="0.738cm" svg:x="16.153cm" svg:y="6.638cm">
              <draw:text-box>
                <text:p text:style-name="P3"><text:span text:style-name="T2">Fabricação</text:span></text:p>
              </draw:text-box>
            </draw:frame>
            <draw:custom-shape draw:style-name="gr6" draw:text-style-name="P7" draw:layer="layout" svg:width="4.98cm" svg:height="2.7cm" svg:x="14.35cm" svg:y="5.15cm">
              <text:p text:style-name="P6"><text:span text:style-name="T3">Válido <text:s/>por <text:s/>5 <text:s/>dias <text:s/>após <text:s/>a <text:s text:c="2"/>Fabricação</text:span></text:p>
  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-0.141474805772445 7493.81265362266" draw:enhanced-path="A ?f5 ?f5 ?f11 ?f11 ?f10 ?f9 ?f8 ?f9 N A 0 0 21600 21600 ?f4 ?f3 ?f2 ?f3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?f5 *cos($0 *(pi/180))"/>
                <draw:equation draw:name="f7" draw:formula="?f5 *sin($0 *(pi/180))"/>
                <draw:equation draw:name="f8" draw:formula="?f6 +10800"/>
                <draw:equation draw:name="f9" draw:formula="?f7 +10800"/>
                <draw:equation draw:name="f10" draw:formula="21600-?f8 "/>
                <draw:equation draw:name="f11" draw:formula="21600-?f5 "/>
                <draw:handle draw:handle-radius-range-minimum="0" draw:handle-radius-range-maximum="10800" draw:handle-polar="10800 10800" draw:handle-polar-pole-x="10800" draw:handle-polar-pole-y="10800" draw:handle-position="$1 $0" draw:handle-polar-radius="$1" draw:handle-polar-angle="$0"/>
              </draw:enhanced-geometry>
            </draw:custom-shape>
            <draw:custom-shape draw:style-name="gr7" draw:text-style-name="P9" draw:layer="layout" svg:width="5.13cm" svg:height="3.85cm" svg:x="14.257cm" svg:y="2.65cm">
              <text:p text:style-name="P8"><text:span text:style-name="T4">S a l a d a <text:s text:c="2"/>T r o p i c a l</text:span></text:p>
  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handle draw:handle-polar="10800 10800" draw:handle-polar-pole-x="10800" draw:handle-polar-pole-y="10800" draw:handle-position="10800 $0" draw:handle-polar-radius="10800" draw:handle-polar-angle="$0"/>
              </draw:enhanced-geometry>
            </draw:custom-shape>
          </draw:g>
          <draw:g draw:style-name="gr1">
            <draw:custom-shape draw:style-name="gr2" draw:text-style-name="P1" draw:layer="layout" svg:width="6cm" svg:height="6cm" svg:x="7.45cm" svg:y="2.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" draw:text-style-name="P2" draw:layer="layout" svg:width="4.975cm" svg:height="2.757cm" svg:x="8cm" svg:y="3.1cm">
              <draw:image xlink:href="Pictures/100000010000029F0000017459C4B5FF.png" xlink:type="simple" xlink:show="embed" xlink:actuate="onLoad" draw:mime-type="image/png">
                <text:p/>
              </draw:image>
            </draw:frame>
            <draw:frame draw:style-name="gr3" draw:text-style-name="P2" draw:layer="layout" svg:width="5.85cm" svg:height="0.647cm" svg:x="7.48cm" svg:y="5.7cm">
              <draw:image xlink:href="Pictures/100000010000044C0000007A92682D90.png" xlink:type="simple" xlink:show="embed" xlink:actuate="onLoad" draw:mime-type="image/png">
                <text:p/>
              </draw:image>
            </draw:frame>
            <draw:frame draw:style-name="gr4" draw:text-style-name="P4" draw:layer="layout" svg:width="2.404cm" svg:height="0.738cm" svg:x="9.753cm" svg:y="6.217cm">
              <draw:text-box>
                <text:p text:style-name="P3"><text:span text:style-name="T1">__/__/___</text:span></text:p>
              </draw:text-box>
            </draw:frame>
            <draw:frame draw:style-name="gr3" draw:text-style-name="P2" draw:layer="layout" svg:width="1.066cm" svg:height="0.95cm" svg:x="8.826cm" svg:y="6.3cm">
              <draw:image xlink:href="Pictures/10000001000000650000006823622E01.png" xlink:type="simple" xlink:show="embed" xlink:actuate="onLoad" draw:mime-type="image/png">
                <text:p/>
              </draw:image>
            </draw:frame>
            <draw:frame draw:style-name="gr5" draw:text-style-name="P5" draw:layer="layout" svg:width="2.276cm" svg:height="0.738cm" svg:x="9.753cm" svg:y="6.638cm">
              <draw:text-box>
                <text:p text:style-name="P3"><text:span text:style-name="T2">Fabricação</text:span></text:p>
              </draw:text-box>
            </draw:frame>
            <draw:custom-shape draw:style-name="gr6" draw:text-style-name="P7" draw:layer="layout" svg:width="4.98cm" svg:height="2.7cm" svg:x="7.95cm" svg:y="5.15cm">
              <text:p text:style-name="P6"><text:span text:style-name="T3">Válido <text:s/>por <text:s/>5 <text:s/>dias <text:s/>após <text:s/>a <text:s text:c="2"/>Fabricação</text:span></text:p>
  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-0.141474805772445 7493.81265362266" draw:enhanced-path="A ?f5 ?f5 ?f11 ?f11 ?f10 ?f9 ?f8 ?f9 N A 0 0 21600 21600 ?f4 ?f3 ?f2 ?f3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?f5 *cos($0 *(pi/180))"/>
                <draw:equation draw:name="f7" draw:formula="?f5 *sin($0 *(pi/180))"/>
                <draw:equation draw:name="f8" draw:formula="?f6 +10800"/>
                <draw:equation draw:name="f9" draw:formula="?f7 +10800"/>
                <draw:equation draw:name="f10" draw:formula="21600-?f8 "/>
                <draw:equation draw:name="f11" draw:formula="21600-?f5 "/>
                <draw:handle draw:handle-radius-range-minimum="0" draw:handle-radius-range-maximum="10800" draw:handle-polar="10800 10800" draw:handle-polar-pole-x="10800" draw:handle-polar-pole-y="10800" draw:handle-position="$1 $0" draw:handle-polar-radius="$1" draw:handle-polar-angle="$0"/>
              </draw:enhanced-geometry>
            </draw:custom-shape>
            <draw:custom-shape draw:style-name="gr7" draw:text-style-name="P9" draw:layer="layout" svg:width="5.13cm" svg:height="3.85cm" svg:x="7.857cm" svg:y="2.65cm">
              <text:p text:style-name="P8"><text:span text:style-name="T4">S a l a d a <text:s text:c="2"/>T r o p i c a l</text:span></text:p>
  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handle draw:handle-polar="10800 10800" draw:handle-polar-pole-x="10800" draw:handle-polar-pole-y="10800" draw:handle-position="10800 $0" draw:handle-polar-radius="10800" draw:handle-polar-angle="$0"/>
              </draw:enhanced-geometry>
            </draw:custom-shape>
          </draw:g>
          <draw:g draw:style-name="gr1">
            <draw:custom-shape draw:style-name="gr2" draw:text-style-name="P1" draw:layer="layout" svg:width="6cm" svg:height="6cm" svg:x="1.05cm" svg:y="8.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" draw:text-style-name="P2" draw:layer="layout" svg:width="4.975cm" svg:height="2.757cm" svg:x="1.6cm" svg:y="9.6cm">
              <draw:image xlink:href="Pictures/100000010000029F0000017459C4B5FF.png" xlink:type="simple" xlink:show="embed" xlink:actuate="onLoad" draw:mime-type="image/png">
                <text:p/>
              </draw:image>
            </draw:frame>
            <draw:frame draw:style-name="gr3" draw:text-style-name="P2" draw:layer="layout" svg:width="5.85cm" svg:height="0.647cm" svg:x="1.08cm" svg:y="12.2cm">
              <draw:image xlink:href="Pictures/100000010000044C0000007A92682D90.png" xlink:type="simple" xlink:show="embed" xlink:actuate="onLoad" draw:mime-type="image/png">
                <text:p/>
              </draw:image>
            </draw:frame>
            <draw:frame draw:style-name="gr4" draw:text-style-name="P4" draw:layer="layout" svg:width="2.404cm" svg:height="0.738cm" svg:x="3.353cm" svg:y="12.717cm">
              <draw:text-box>
                <text:p text:style-name="P3"><text:span text:style-name="T1">__/__/___</text:span></text:p>
              </draw:text-box>
            </draw:frame>
            <draw:frame draw:style-name="gr3" draw:text-style-name="P2" draw:layer="layout" svg:width="1.066cm" svg:height="0.95cm" svg:x="2.426cm" svg:y="12.8cm">
              <draw:image xlink:href="Pictures/10000001000000650000006823622E01.png" xlink:type="simple" xlink:show="embed" xlink:actuate="onLoad" draw:mime-type="image/png">
                <text:p/>
              </draw:image>
            </draw:frame>
            <draw:frame draw:style-name="gr5" draw:text-style-name="P5" draw:layer="layout" svg:width="2.276cm" svg:height="0.738cm" svg:x="3.353cm" svg:y="13.138cm">
              <draw:text-box>
                <text:p text:style-name="P3"><text:span text:style-name="T2">Fabricação</text:span></text:p>
              </draw:text-box>
            </draw:frame>
            <draw:custom-shape draw:style-name="gr6" draw:text-style-name="P7" draw:layer="layout" svg:width="4.98cm" svg:height="2.7cm" svg:x="1.55cm" svg:y="11.65cm">
              <text:p text:style-name="P6"><text:span text:style-name="T3">Válido <text:s/>por <text:s/>5 <text:s/>dias <text:s/>após <text:s/>a <text:s text:c="2"/>Fabricação</text:span></text:p>
  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-0.141474805772445 7493.81265362266" draw:enhanced-path="A ?f5 ?f5 ?f11 ?f11 ?f10 ?f9 ?f8 ?f9 N A 0 0 21600 21600 ?f4 ?f3 ?f2 ?f3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?f5 *cos($0 *(pi/180))"/>
                <draw:equation draw:name="f7" draw:formula="?f5 *sin($0 *(pi/180))"/>
                <draw:equation draw:name="f8" draw:formula="?f6 +10800"/>
                <draw:equation draw:name="f9" draw:formula="?f7 +10800"/>
                <draw:equation draw:name="f10" draw:formula="21600-?f8 "/>
                <draw:equation draw:name="f11" draw:formula="21600-?f5 "/>
                <draw:handle draw:handle-radius-range-minimum="0" draw:handle-radius-range-maximum="10800" draw:handle-polar="10800 10800" draw:handle-polar-pole-x="10800" draw:handle-polar-pole-y="10800" draw:handle-position="$1 $0" draw:handle-polar-radius="$1" draw:handle-polar-angle="$0"/>
              </draw:enhanced-geometry>
            </draw:custom-shape>
            <draw:custom-shape draw:style-name="gr7" draw:text-style-name="P9" draw:layer="layout" svg:width="5.13cm" svg:height="3.85cm" svg:x="1.457cm" svg:y="9.15cm">
              <text:p text:style-name="P8"><text:span text:style-name="T4">S a l a d a <text:s text:c="2"/>T r o p i c a l</text:span></text:p>
  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handle draw:handle-polar="10800 10800" draw:handle-polar-pole-x="10800" draw:handle-polar-pole-y="10800" draw:handle-position="10800 $0" draw:handle-polar-radius="10800" draw:handle-polar-angle="$0"/>
              </draw:enhanced-geometry>
            </draw:custom-shape>
          </draw:g>
          <draw:g draw:style-name="gr1">
            <draw:custom-shape draw:style-name="gr2" draw:text-style-name="P1" draw:layer="layout" svg:width="6cm" svg:height="6cm" svg:x="13.85cm" svg:y="8.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" draw:text-style-name="P2" draw:layer="layout" svg:width="4.975cm" svg:height="2.757cm" svg:x="14.4cm" svg:y="9.6cm">
              <draw:image xlink:href="Pictures/100000010000029F0000017459C4B5FF.png" xlink:type="simple" xlink:show="embed" xlink:actuate="onLoad" draw:mime-type="image/png">
                <text:p/>
              </draw:image>
            </draw:frame>
            <draw:frame draw:style-name="gr3" draw:text-style-name="P2" draw:layer="layout" svg:width="5.85cm" svg:height="0.647cm" svg:x="13.88cm" svg:y="12.2cm">
              <draw:image xlink:href="Pictures/100000010000044C0000007A92682D90.png" xlink:type="simple" xlink:show="embed" xlink:actuate="onLoad" draw:mime-type="image/png">
                <text:p/>
              </draw:image>
            </draw:frame>
            <draw:frame draw:style-name="gr4" draw:text-style-name="P4" draw:layer="layout" svg:width="2.404cm" svg:height="0.738cm" svg:x="16.153cm" svg:y="12.717cm">
              <draw:text-box>
                <text:p text:style-name="P3"><text:span text:style-name="T1">__/__/___</text:span></text:p>
              </draw:text-box>
            </draw:frame>
            <draw:frame draw:style-name="gr3" draw:text-style-name="P2" draw:layer="layout" svg:width="1.066cm" svg:height="0.95cm" svg:x="15.226cm" svg:y="12.8cm">
              <draw:image xlink:href="Pictures/10000001000000650000006823622E01.png" xlink:type="simple" xlink:show="embed" xlink:actuate="onLoad" draw:mime-type="image/png">
                <text:p/>
              </draw:image>
            </draw:frame>
            <draw:frame draw:style-name="gr5" draw:text-style-name="P5" draw:layer="layout" svg:width="2.276cm" svg:height="0.738cm" svg:x="16.153cm" svg:y="13.138cm">
              <draw:text-box>
                <text:p text:style-name="P3"><text:span text:style-name="T2">Fabricação</text:span></text:p>
              </draw:text-box>
            </draw:frame>
            <draw:custom-shape draw:style-name="gr6" draw:text-style-name="P7" draw:layer="layout" svg:width="4.98cm" svg:height="2.7cm" svg:x="14.35cm" svg:y="11.65cm">
              <text:p text:style-name="P6"><text:span text:style-name="T3">Válido <text:s/>por <text:s/>5 <text:s/>dias <text:s/>após <text:s/>a <text:s text:c="2"/>Fabricação</text:span></text:p>
  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-0.141474805772445 7493.81265362266" draw:enhanced-path="A ?f5 ?f5 ?f11 ?f11 ?f10 ?f9 ?f8 ?f9 N A 0 0 21600 21600 ?f4 ?f3 ?f2 ?f3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?f5 *cos($0 *(pi/180))"/>
                <draw:equation draw:name="f7" draw:formula="?f5 *sin($0 *(pi/180))"/>
                <draw:equation draw:name="f8" draw:formula="?f6 +10800"/>
                <draw:equation draw:name="f9" draw:formula="?f7 +10800"/>
                <draw:equation draw:name="f10" draw:formula="21600-?f8 "/>
                <draw:equation draw:name="f11" draw:formula="21600-?f5 "/>
                <draw:handle draw:handle-radius-range-minimum="0" draw:handle-radius-range-maximum="10800" draw:handle-polar="10800 10800" draw:handle-polar-pole-x="10800" draw:handle-polar-pole-y="10800" draw:handle-position="$1 $0" draw:handle-polar-radius="$1" draw:handle-polar-angle="$0"/>
              </draw:enhanced-geometry>
            </draw:custom-shape>
            <draw:custom-shape draw:style-name="gr7" draw:text-style-name="P9" draw:layer="layout" svg:width="5.13cm" svg:height="3.85cm" svg:x="14.257cm" svg:y="9.15cm">
              <text:p text:style-name="P8"><text:span text:style-name="T4">S a l a d a <text:s text:c="2"/>T r o p i c a l</text:span></text:p>
  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handle draw:handle-polar="10800 10800" draw:handle-polar-pole-x="10800" draw:handle-polar-pole-y="10800" draw:handle-position="10800 $0" draw:handle-polar-radius="10800" draw:handle-polar-angle="$0"/>
              </draw:enhanced-geometry>
            </draw:custom-shape>
          </draw:g>
          <draw:g draw:style-name="gr1">
            <draw:custom-shape draw:style-name="gr2" draw:text-style-name="P1" draw:layer="layout" svg:width="6cm" svg:height="6cm" svg:x="7.45cm" svg:y="8.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" draw:text-style-name="P2" draw:layer="layout" svg:width="4.975cm" svg:height="2.757cm" svg:x="8cm" svg:y="9.6cm">
              <draw:image xlink:href="Pictures/100000010000029F0000017459C4B5FF.png" xlink:type="simple" xlink:show="embed" xlink:actuate="onLoad" draw:mime-type="image/png">
                <text:p/>
              </draw:image>
            </draw:frame>
            <draw:frame draw:style-name="gr3" draw:text-style-name="P2" draw:layer="layout" svg:width="5.85cm" svg:height="0.647cm" svg:x="7.48cm" svg:y="12.2cm">
              <draw:image xlink:href="Pictures/100000010000044C0000007A92682D90.png" xlink:type="simple" xlink:show="embed" xlink:actuate="onLoad" draw:mime-type="image/png">
                <text:p/>
              </draw:image>
            </draw:frame>
            <draw:frame draw:style-name="gr4" draw:text-style-name="P4" draw:layer="layout" svg:width="2.404cm" svg:height="0.738cm" svg:x="9.753cm" svg:y="12.717cm">
              <draw:text-box>
                <text:p text:style-name="P3"><text:span text:style-name="T1">__/__/___</text:span></text:p>
              </draw:text-box>
            </draw:frame>
            <draw:frame draw:style-name="gr3" draw:text-style-name="P2" draw:layer="layout" svg:width="1.066cm" svg:height="0.95cm" svg:x="8.826cm" svg:y="12.8cm">
              <draw:image xlink:href="Pictures/10000001000000650000006823622E01.png" xlink:type="simple" xlink:show="embed" xlink:actuate="onLoad" draw:mime-type="image/png">
                <text:p/>
              </draw:image>
            </draw:frame>
            <draw:frame draw:style-name="gr5" draw:text-style-name="P5" draw:layer="layout" svg:width="2.276cm" svg:height="0.738cm" svg:x="9.753cm" svg:y="13.138cm">
              <draw:text-box>
                <text:p text:style-name="P3"><text:span text:style-name="T2">Fabricação</text:span></text:p>
              </draw:text-box>
            </draw:frame>
            <draw:custom-shape draw:style-name="gr6" draw:text-style-name="P7" draw:layer="layout" svg:width="4.98cm" svg:height="2.7cm" svg:x="7.95cm" svg:y="11.65cm">
              <text:p text:style-name="P6"><text:span text:style-name="T3">Válido <text:s/>por <text:s/>5 <text:s/>dias <text:s/>após <text:s/>a <text:s text:c="2"/>Fabricação</text:span></text:p>
  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-0.141474805772445 7493.81265362266" draw:enhanced-path="A ?f5 ?f5 ?f11 ?f11 ?f10 ?f9 ?f8 ?f9 N A 0 0 21600 21600 ?f4 ?f3 ?f2 ?f3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?f5 *cos($0 *(pi/180))"/>
                <draw:equation draw:name="f7" draw:formula="?f5 *sin($0 *(pi/180))"/>
                <draw:equation draw:name="f8" draw:formula="?f6 +10800"/>
                <draw:equation draw:name="f9" draw:formula="?f7 +10800"/>
                <draw:equation draw:name="f10" draw:formula="21600-?f8 "/>
                <draw:equation draw:name="f11" draw:formula="21600-?f5 "/>
                <draw:handle draw:handle-radius-range-minimum="0" draw:handle-radius-range-maximum="10800" draw:handle-polar="10800 10800" draw:handle-polar-pole-x="10800" draw:handle-polar-pole-y="10800" draw:handle-position="$1 $0" draw:handle-polar-radius="$1" draw:handle-polar-angle="$0"/>
              </draw:enhanced-geometry>
            </draw:custom-shape>
            <draw:custom-shape draw:style-name="gr7" draw:text-style-name="P9" draw:layer="layout" svg:width="5.13cm" svg:height="3.85cm" svg:x="7.857cm" svg:y="9.15cm">
              <text:p text:style-name="P8"><text:span text:style-name="T4">S a l a d a <text:s text:c="2"/>T r o p i c a l</text:span></text:p>
  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handle draw:handle-polar="10800 10800" draw:handle-polar-pole-x="10800" draw:handle-polar-pole-y="10800" draw:handle-position="10800 $0" draw:handle-polar-radius="10800" draw:handle-polar-angle="$0"/>
              </draw:enhanced-geometry>
            </draw:custom-shape>
          </draw:g>
          <draw:g draw:style-name="gr1">
            <draw:custom-shape draw:style-name="gr2" draw:text-style-name="P1" draw:layer="layout" svg:width="6cm" svg:height="6cm" svg:x="1.05cm" svg:y="15.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" draw:text-style-name="P2" draw:layer="layout" svg:width="4.975cm" svg:height="2.757cm" svg:x="1.6cm" svg:y="16.1cm">
              <draw:image xlink:href="Pictures/100000010000029F0000017459C4B5FF.png" xlink:type="simple" xlink:show="embed" xlink:actuate="onLoad" draw:mime-type="image/png">
                <text:p/>
              </draw:image>
            </draw:frame>
            <draw:frame draw:style-name="gr3" draw:text-style-name="P2" draw:layer="layout" svg:width="5.85cm" svg:height="0.647cm" svg:x="1.08cm" svg:y="18.7cm">
              <draw:image xlink:href="Pictures/100000010000044C0000007A92682D90.png" xlink:type="simple" xlink:show="embed" xlink:actuate="onLoad" draw:mime-type="image/png">
                <text:p/>
              </draw:image>
            </draw:frame>
            <draw:frame draw:style-name="gr4" draw:text-style-name="P4" draw:layer="layout" svg:width="2.404cm" svg:height="0.738cm" svg:x="3.353cm" svg:y="19.217cm">
              <draw:text-box>
                <text:p text:style-name="P3"><text:span text:style-name="T1">__/__/___</text:span></text:p>
              </draw:text-box>
            </draw:frame>
            <draw:frame draw:style-name="gr3" draw:text-style-name="P2" draw:layer="layout" svg:width="1.066cm" svg:height="0.95cm" svg:x="2.426cm" svg:y="19.3cm">
              <draw:image xlink:href="Pictures/10000001000000650000006823622E01.png" xlink:type="simple" xlink:show="embed" xlink:actuate="onLoad" draw:mime-type="image/png">
                <text:p/>
              </draw:image>
            </draw:frame>
            <draw:frame draw:style-name="gr5" draw:text-style-name="P5" draw:layer="layout" svg:width="2.276cm" svg:height="0.738cm" svg:x="3.353cm" svg:y="19.638cm">
              <draw:text-box>
                <text:p text:style-name="P3"><text:span text:style-name="T2">Fabricação</text:span></text:p>
              </draw:text-box>
            </draw:frame>
            <draw:custom-shape draw:style-name="gr6" draw:text-style-name="P7" draw:layer="layout" svg:width="4.98cm" svg:height="2.7cm" svg:x="1.55cm" svg:y="18.15cm">
              <text:p text:style-name="P6"><text:span text:style-name="T3">Válido <text:s/>por <text:s/>5 <text:s/>dias <text:s/>após <text:s/>a <text:s text:c="2"/>Fabricação</text:span></text:p>
  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-0.141474805772445 7493.81265362266" draw:enhanced-path="A ?f5 ?f5 ?f11 ?f11 ?f10 ?f9 ?f8 ?f9 N A 0 0 21600 21600 ?f4 ?f3 ?f2 ?f3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?f5 *cos($0 *(pi/180))"/>
                <draw:equation draw:name="f7" draw:formula="?f5 *sin($0 *(pi/180))"/>
                <draw:equation draw:name="f8" draw:formula="?f6 +10800"/>
                <draw:equation draw:name="f9" draw:formula="?f7 +10800"/>
                <draw:equation draw:name="f10" draw:formula="21600-?f8 "/>
                <draw:equation draw:name="f11" draw:formula="21600-?f5 "/>
                <draw:handle draw:handle-radius-range-minimum="0" draw:handle-radius-range-maximum="10800" draw:handle-polar="10800 10800" draw:handle-polar-pole-x="10800" draw:handle-polar-pole-y="10800" draw:handle-position="$1 $0" draw:handle-polar-radius="$1" draw:handle-polar-angle="$0"/>
              </draw:enhanced-geometry>
            </draw:custom-shape>
            <draw:custom-shape draw:style-name="gr7" draw:text-style-name="P9" draw:layer="layout" svg:width="5.13cm" svg:height="3.85cm" svg:x="1.457cm" svg:y="15.65cm">
              <text:p text:style-name="P8"><text:span text:style-name="T4">S a l a d a <text:s text:c="2"/>T r o p i c a l</text:span></text:p>
  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handle draw:handle-polar="10800 10800" draw:handle-polar-pole-x="10800" draw:handle-polar-pole-y="10800" draw:handle-position="10800 $0" draw:handle-polar-radius="10800" draw:handle-polar-angle="$0"/>
              </draw:enhanced-geometry>
            </draw:custom-shape>
          </draw:g>
          <draw:g draw:style-name="gr1">
            <draw:custom-shape draw:style-name="gr2" draw:text-style-name="P1" draw:layer="layout" svg:width="6cm" svg:height="6cm" svg:x="13.85cm" svg:y="15.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" draw:text-style-name="P2" draw:layer="layout" svg:width="4.975cm" svg:height="2.757cm" svg:x="14.4cm" svg:y="16.1cm">
              <draw:image xlink:href="Pictures/100000010000029F0000017459C4B5FF.png" xlink:type="simple" xlink:show="embed" xlink:actuate="onLoad" draw:mime-type="image/png">
                <text:p/>
              </draw:image>
            </draw:frame>
            <draw:frame draw:style-name="gr3" draw:text-style-name="P2" draw:layer="layout" svg:width="5.85cm" svg:height="0.647cm" svg:x="13.88cm" svg:y="18.7cm">
              <draw:image xlink:href="Pictures/100000010000044C0000007A92682D90.png" xlink:type="simple" xlink:show="embed" xlink:actuate="onLoad" draw:mime-type="image/png">
                <text:p/>
              </draw:image>
            </draw:frame>
            <draw:frame draw:style-name="gr4" draw:text-style-name="P4" draw:layer="layout" svg:width="2.404cm" svg:height="0.738cm" svg:x="16.153cm" svg:y="19.217cm">
              <draw:text-box>
                <text:p text:style-name="P3"><text:span text:style-name="T1">__/__/___</text:span></text:p>
              </draw:text-box>
            </draw:frame>
            <draw:frame draw:style-name="gr3" draw:text-style-name="P2" draw:layer="layout" svg:width="1.066cm" svg:height="0.95cm" svg:x="15.226cm" svg:y="19.3cm">
              <draw:image xlink:href="Pictures/10000001000000650000006823622E01.png" xlink:type="simple" xlink:show="embed" xlink:actuate="onLoad" draw:mime-type="image/png">
                <text:p/>
              </draw:image>
            </draw:frame>
            <draw:frame draw:style-name="gr5" draw:text-style-name="P5" draw:layer="layout" svg:width="2.276cm" svg:height="0.738cm" svg:x="16.153cm" svg:y="19.638cm">
              <draw:text-box>
                <text:p text:style-name="P3"><text:span text:style-name="T2">Fabricação</text:span></text:p>
              </draw:text-box>
            </draw:frame>
            <draw:custom-shape draw:style-name="gr6" draw:text-style-name="P7" draw:layer="layout" svg:width="4.98cm" svg:height="2.7cm" svg:x="14.35cm" svg:y="18.15cm">
              <text:p text:style-name="P6"><text:span text:style-name="T3">Válido <text:s/>por <text:s/>5 <text:s/>dias <text:s/>após <text:s/>a <text:s text:c="2"/>Fabricação</text:span></text:p>
  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-0.141474805772445 7493.81265362266" draw:enhanced-path="A ?f5 ?f5 ?f11 ?f11 ?f10 ?f9 ?f8 ?f9 N A 0 0 21600 21600 ?f4 ?f3 ?f2 ?f3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?f5 *cos($0 *(pi/180))"/>
                <draw:equation draw:name="f7" draw:formula="?f5 *sin($0 *(pi/180))"/>
                <draw:equation draw:name="f8" draw:formula="?f6 +10800"/>
                <draw:equation draw:name="f9" draw:formula="?f7 +10800"/>
                <draw:equation draw:name="f10" draw:formula="21600-?f8 "/>
                <draw:equation draw:name="f11" draw:formula="21600-?f5 "/>
                <draw:handle draw:handle-radius-range-minimum="0" draw:handle-radius-range-maximum="10800" draw:handle-polar="10800 10800" draw:handle-polar-pole-x="10800" draw:handle-polar-pole-y="10800" draw:handle-position="$1 $0" draw:handle-polar-radius="$1" draw:handle-polar-angle="$0"/>
              </draw:enhanced-geometry>
            </draw:custom-shape>
            <draw:custom-shape draw:style-name="gr7" draw:text-style-name="P9" draw:layer="layout" svg:width="5.13cm" svg:height="3.85cm" svg:x="14.257cm" svg:y="15.65cm">
              <text:p text:style-name="P8"><text:span text:style-name="T4">S a l a d a <text:s text:c="2"/>T r o p i c a l</text:span></text:p>
  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handle draw:handle-polar="10800 10800" draw:handle-polar-pole-x="10800" draw:handle-polar-pole-y="10800" draw:handle-position="10800 $0" draw:handle-polar-radius="10800" draw:handle-polar-angle="$0"/>
              </draw:enhanced-geometry>
            </draw:custom-shape>
          </draw:g>
          <draw:g draw:style-name="gr1">
            <draw:custom-shape draw:style-name="gr2" draw:text-style-name="P1" draw:layer="layout" svg:width="6cm" svg:height="6cm" svg:x="7.45cm" svg:y="15.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" draw:text-style-name="P2" draw:layer="layout" svg:width="4.975cm" svg:height="2.757cm" svg:x="8cm" svg:y="16.1cm">
              <draw:image xlink:href="Pictures/100000010000029F0000017459C4B5FF.png" xlink:type="simple" xlink:show="embed" xlink:actuate="onLoad" draw:mime-type="image/png">
                <text:p/>
              </draw:image>
            </draw:frame>
            <draw:frame draw:style-name="gr3" draw:text-style-name="P2" draw:layer="layout" svg:width="5.85cm" svg:height="0.647cm" svg:x="7.48cm" svg:y="18.7cm">
              <draw:image xlink:href="Pictures/100000010000044C0000007A92682D90.png" xlink:type="simple" xlink:show="embed" xlink:actuate="onLoad" draw:mime-type="image/png">
                <text:p/>
              </draw:image>
            </draw:frame>
            <draw:frame draw:style-name="gr4" draw:text-style-name="P4" draw:layer="layout" svg:width="2.404cm" svg:height="0.738cm" svg:x="9.753cm" svg:y="19.217cm">
              <draw:text-box>
                <text:p text:style-name="P3"><text:span text:style-name="T1">__/__/___</text:span></text:p>
              </draw:text-box>
            </draw:frame>
            <draw:frame draw:style-name="gr3" draw:text-style-name="P2" draw:layer="layout" svg:width="1.066cm" svg:height="0.95cm" svg:x="8.826cm" svg:y="19.3cm">
              <draw:image xlink:href="Pictures/10000001000000650000006823622E01.png" xlink:type="simple" xlink:show="embed" xlink:actuate="onLoad" draw:mime-type="image/png">
                <text:p/>
              </draw:image>
            </draw:frame>
            <draw:frame draw:style-name="gr5" draw:text-style-name="P5" draw:layer="layout" svg:width="2.276cm" svg:height="0.738cm" svg:x="9.753cm" svg:y="19.638cm">
              <draw:text-box>
                <text:p text:style-name="P3"><text:span text:style-name="T2">Fabricação</text:span></text:p>
              </draw:text-box>
            </draw:frame>
            <draw:custom-shape draw:style-name="gr6" draw:text-style-name="P7" draw:layer="layout" svg:width="4.98cm" svg:height="2.7cm" svg:x="7.95cm" svg:y="18.15cm">
              <text:p text:style-name="P6"><text:span text:style-name="T3">Válido <text:s/>por <text:s/>5 <text:s/>dias <text:s/>após <text:s/>a <text:s text:c="2"/>Fabricação</text:span></text:p>
  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-0.141474805772445 7493.81265362266" draw:enhanced-path="A ?f5 ?f5 ?f11 ?f11 ?f10 ?f9 ?f8 ?f9 N A 0 0 21600 21600 ?f4 ?f3 ?f2 ?f3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?f5 *cos($0 *(pi/180))"/>
                <draw:equation draw:name="f7" draw:formula="?f5 *sin($0 *(pi/180))"/>
                <draw:equation draw:name="f8" draw:formula="?f6 +10800"/>
                <draw:equation draw:name="f9" draw:formula="?f7 +10800"/>
                <draw:equation draw:name="f10" draw:formula="21600-?f8 "/>
                <draw:equation draw:name="f11" draw:formula="21600-?f5 "/>
                <draw:handle draw:handle-radius-range-minimum="0" draw:handle-radius-range-maximum="10800" draw:handle-polar="10800 10800" draw:handle-polar-pole-x="10800" draw:handle-polar-pole-y="10800" draw:handle-position="$1 $0" draw:handle-polar-radius="$1" draw:handle-polar-angle="$0"/>
              </draw:enhanced-geometry>
            </draw:custom-shape>
            <draw:custom-shape draw:style-name="gr7" draw:text-style-name="P9" draw:layer="layout" svg:width="5.13cm" svg:height="3.85cm" svg:x="7.857cm" svg:y="15.65cm">
              <text:p text:style-name="P8"><text:span text:style-name="T4">S a l a d a <text:s text:c="2"/>T r o p i c a l</text:span></text:p>
  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handle draw:handle-polar="10800 10800" draw:handle-polar-pole-x="10800" draw:handle-polar-pole-y="10800" draw:handle-position="10800 $0" draw:handle-polar-radius="10800" draw:handle-polar-angle="$0"/>
              </draw:enhanced-geometry>
            </draw:custom-shape>
          </draw:g>
          <draw:g draw:style-name="gr1">
            <draw:custom-shape draw:style-name="gr2" draw:text-style-name="P1" draw:layer="layout" svg:width="6cm" svg:height="6cm" svg:x="1.05cm" svg:y="21.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" draw:text-style-name="P2" draw:layer="layout" svg:width="4.975cm" svg:height="2.757cm" svg:x="1.6cm" svg:y="22.6cm">
              <draw:image xlink:href="Pictures/100000010000029F0000017459C4B5FF.png" xlink:type="simple" xlink:show="embed" xlink:actuate="onLoad" draw:mime-type="image/png">
                <text:p/>
              </draw:image>
            </draw:frame>
            <draw:frame draw:style-name="gr3" draw:text-style-name="P2" draw:layer="layout" svg:width="5.85cm" svg:height="0.647cm" svg:x="1.08cm" svg:y="25.2cm">
              <draw:image xlink:href="Pictures/100000010000044C0000007A92682D90.png" xlink:type="simple" xlink:show="embed" xlink:actuate="onLoad" draw:mime-type="image/png">
                <text:p/>
              </draw:image>
            </draw:frame>
            <draw:frame draw:style-name="gr4" draw:text-style-name="P4" draw:layer="layout" svg:width="2.404cm" svg:height="0.738cm" svg:x="3.353cm" svg:y="25.717cm">
              <draw:text-box>
                <text:p text:style-name="P3"><text:span text:style-name="T1">__/__/___</text:span></text:p>
              </draw:text-box>
            </draw:frame>
            <draw:frame draw:style-name="gr3" draw:text-style-name="P2" draw:layer="layout" svg:width="1.066cm" svg:height="0.95cm" svg:x="2.426cm" svg:y="25.8cm">
              <draw:image xlink:href="Pictures/10000001000000650000006823622E01.png" xlink:type="simple" xlink:show="embed" xlink:actuate="onLoad" draw:mime-type="image/png">
                <text:p/>
              </draw:image>
            </draw:frame>
            <draw:frame draw:style-name="gr5" draw:text-style-name="P5" draw:layer="layout" svg:width="2.276cm" svg:height="0.738cm" svg:x="3.353cm" svg:y="26.138cm">
              <draw:text-box>
                <text:p text:style-name="P3"><text:span text:style-name="T2">Fabricação</text:span></text:p>
              </draw:text-box>
            </draw:frame>
            <draw:custom-shape draw:style-name="gr6" draw:text-style-name="P7" draw:layer="layout" svg:width="4.98cm" svg:height="2.7cm" svg:x="1.55cm" svg:y="24.65cm">
              <text:p text:style-name="P6"><text:span text:style-name="T3">Válido <text:s/>por <text:s/>5 <text:s/>dias <text:s/>após <text:s/>a <text:s text:c="2"/>Fabricação</text:span></text:p>
  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-0.141474805772445 7493.81265362266" draw:enhanced-path="A ?f5 ?f5 ?f11 ?f11 ?f10 ?f9 ?f8 ?f9 N A 0 0 21600 21600 ?f4 ?f3 ?f2 ?f3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?f5 *cos($0 *(pi/180))"/>
                <draw:equation draw:name="f7" draw:formula="?f5 *sin($0 *(pi/180))"/>
                <draw:equation draw:name="f8" draw:formula="?f6 +10800"/>
                <draw:equation draw:name="f9" draw:formula="?f7 +10800"/>
                <draw:equation draw:name="f10" draw:formula="21600-?f8 "/>
                <draw:equation draw:name="f11" draw:formula="21600-?f5 "/>
                <draw:handle draw:handle-radius-range-minimum="0" draw:handle-radius-range-maximum="10800" draw:handle-polar="10800 10800" draw:handle-polar-pole-x="10800" draw:handle-polar-pole-y="10800" draw:handle-position="$1 $0" draw:handle-polar-radius="$1" draw:handle-polar-angle="$0"/>
              </draw:enhanced-geometry>
            </draw:custom-shape>
            <draw:custom-shape draw:style-name="gr7" draw:text-style-name="P9" draw:layer="layout" svg:width="5.13cm" svg:height="3.85cm" svg:x="1.457cm" svg:y="22.15cm">
              <text:p text:style-name="P8"><text:span text:style-name="T4">S a l a d a <text:s text:c="2"/>T r o p i c a l</text:span></text:p>
  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handle draw:handle-polar="10800 10800" draw:handle-polar-pole-x="10800" draw:handle-polar-pole-y="10800" draw:handle-position="10800 $0" draw:handle-polar-radius="10800" draw:handle-polar-angle="$0"/>
              </draw:enhanced-geometry>
            </draw:custom-shape>
          </draw:g>
          <draw:g draw:style-name="gr1">
            <draw:custom-shape draw:style-name="gr2" draw:text-style-name="P1" draw:layer="layout" svg:width="6cm" svg:height="6cm" svg:x="13.85cm" svg:y="21.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" draw:text-style-name="P2" draw:layer="layout" svg:width="4.975cm" svg:height="2.757cm" svg:x="14.4cm" svg:y="22.6cm">
              <draw:image xlink:href="Pictures/100000010000029F0000017459C4B5FF.png" xlink:type="simple" xlink:show="embed" xlink:actuate="onLoad" draw:mime-type="image/png">
                <text:p/>
              </draw:image>
            </draw:frame>
            <draw:frame draw:style-name="gr3" draw:text-style-name="P2" draw:layer="layout" svg:width="5.85cm" svg:height="0.647cm" svg:x="13.88cm" svg:y="25.2cm">
              <draw:image xlink:href="Pictures/100000010000044C0000007A92682D90.png" xlink:type="simple" xlink:show="embed" xlink:actuate="onLoad" draw:mime-type="image/png">
                <text:p/>
              </draw:image>
            </draw:frame>
            <draw:frame draw:style-name="gr4" draw:text-style-name="P4" draw:layer="layout" svg:width="2.404cm" svg:height="0.738cm" svg:x="16.153cm" svg:y="25.717cm">
              <draw:text-box>
                <text:p text:style-name="P3"><text:span text:style-name="T1">__/__/___</text:span></text:p>
              </draw:text-box>
            </draw:frame>
            <draw:frame draw:style-name="gr3" draw:text-style-name="P2" draw:layer="layout" svg:width="1.066cm" svg:height="0.95cm" svg:x="15.226cm" svg:y="25.8cm">
              <draw:image xlink:href="Pictures/10000001000000650000006823622E01.png" xlink:type="simple" xlink:show="embed" xlink:actuate="onLoad" draw:mime-type="image/png">
                <text:p/>
              </draw:image>
            </draw:frame>
            <draw:frame draw:style-name="gr5" draw:text-style-name="P5" draw:layer="layout" svg:width="2.276cm" svg:height="0.738cm" svg:x="16.153cm" svg:y="26.138cm">
              <draw:text-box>
                <text:p text:style-name="P3"><text:span text:style-name="T2">Fabricação</text:span></text:p>
              </draw:text-box>
            </draw:frame>
            <draw:custom-shape draw:style-name="gr6" draw:text-style-name="P7" draw:layer="layout" svg:width="4.98cm" svg:height="2.7cm" svg:x="14.35cm" svg:y="24.65cm">
              <text:p text:style-name="P6"><text:span text:style-name="T3">Válido <text:s/>por <text:s/>5 <text:s/>dias <text:s/>após <text:s/>a <text:s text:c="2"/>Fabricação</text:span></text:p>
  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-0.141474805772445 7493.81265362266" draw:enhanced-path="A ?f5 ?f5 ?f11 ?f11 ?f10 ?f9 ?f8 ?f9 N A 0 0 21600 21600 ?f4 ?f3 ?f2 ?f3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?f5 *cos($0 *(pi/180))"/>
                <draw:equation draw:name="f7" draw:formula="?f5 *sin($0 *(pi/180))"/>
                <draw:equation draw:name="f8" draw:formula="?f6 +10800"/>
                <draw:equation draw:name="f9" draw:formula="?f7 +10800"/>
                <draw:equation draw:name="f10" draw:formula="21600-?f8 "/>
                <draw:equation draw:name="f11" draw:formula="21600-?f5 "/>
                <draw:handle draw:handle-radius-range-minimum="0" draw:handle-radius-range-maximum="10800" draw:handle-polar="10800 10800" draw:handle-polar-pole-x="10800" draw:handle-polar-pole-y="10800" draw:handle-position="$1 $0" draw:handle-polar-radius="$1" draw:handle-polar-angle="$0"/>
              </draw:enhanced-geometry>
            </draw:custom-shape>
            <draw:custom-shape draw:style-name="gr7" draw:text-style-name="P9" draw:layer="layout" svg:width="5.13cm" svg:height="3.85cm" svg:x="14.257cm" svg:y="22.15cm">
              <text:p text:style-name="P8"><text:span text:style-name="T4">S a l a d a <text:s text:c="2"/>T r o p i c a l</text:span></text:p>
  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handle draw:handle-polar="10800 10800" draw:handle-polar-pole-x="10800" draw:handle-polar-pole-y="10800" draw:handle-position="10800 $0" draw:handle-polar-radius="10800" draw:handle-polar-angle="$0"/>
              </draw:enhanced-geometry>
            </draw:custom-shape>
          </draw:g>
          <draw:g draw:style-name="gr1">
            <draw:custom-shape draw:style-name="gr2" draw:text-style-name="P1" draw:layer="layout" svg:width="6cm" svg:height="6cm" svg:x="7.45cm" svg:y="21.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" draw:text-style-name="P2" draw:layer="layout" svg:width="4.975cm" svg:height="2.757cm" svg:x="8cm" svg:y="22.6cm">
              <draw:image xlink:href="Pictures/100000010000029F0000017459C4B5FF.png" xlink:type="simple" xlink:show="embed" xlink:actuate="onLoad" draw:mime-type="image/png">
                <text:p/>
              </draw:image>
            </draw:frame>
            <draw:frame draw:style-name="gr3" draw:text-style-name="P2" draw:layer="layout" svg:width="5.85cm" svg:height="0.647cm" svg:x="7.48cm" svg:y="25.2cm">
              <draw:image xlink:href="Pictures/100000010000044C0000007A92682D90.png" xlink:type="simple" xlink:show="embed" xlink:actuate="onLoad" draw:mime-type="image/png">
                <text:p/>
              </draw:image>
            </draw:frame>
            <draw:frame draw:style-name="gr4" draw:text-style-name="P4" draw:layer="layout" svg:width="2.404cm" svg:height="0.738cm" svg:x="9.753cm" svg:y="25.717cm">
              <draw:text-box>
                <text:p text:style-name="P3"><text:span text:style-name="T1">__/__/___</text:span></text:p>
              </draw:text-box>
            </draw:frame>
            <draw:frame draw:style-name="gr3" draw:text-style-name="P2" draw:layer="layout" svg:width="1.066cm" svg:height="0.95cm" svg:x="8.826cm" svg:y="25.8cm">
              <draw:image xlink:href="Pictures/10000001000000650000006823622E01.png" xlink:type="simple" xlink:show="embed" xlink:actuate="onLoad" draw:mime-type="image/png">
                <text:p/>
              </draw:image>
            </draw:frame>
            <draw:frame draw:style-name="gr5" draw:text-style-name="P5" draw:layer="layout" svg:width="2.276cm" svg:height="0.738cm" svg:x="9.753cm" svg:y="26.138cm">
              <draw:text-box>
                <text:p text:style-name="P3"><text:span text:style-name="T2">Fabricação</text:span></text:p>
              </draw:text-box>
            </draw:frame>
            <draw:custom-shape draw:style-name="gr6" draw:text-style-name="P7" draw:layer="layout" svg:width="4.98cm" svg:height="2.7cm" svg:x="7.95cm" svg:y="24.65cm">
              <text:p text:style-name="P6"><text:span text:style-name="T3">Válido <text:s/>por <text:s/>5 <text:s/>dias <text:s/>após <text:s/>a <text:s text:c="2"/>Fabricação</text:span></text:p>
  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-0.141474805772445 7493.81265362266" draw:enhanced-path="A ?f5 ?f5 ?f11 ?f11 ?f10 ?f9 ?f8 ?f9 N A 0 0 21600 21600 ?f4 ?f3 ?f2 ?f3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?f5 *cos($0 *(pi/180))"/>
                <draw:equation draw:name="f7" draw:formula="?f5 *sin($0 *(pi/180))"/>
                <draw:equation draw:name="f8" draw:formula="?f6 +10800"/>
                <draw:equation draw:name="f9" draw:formula="?f7 +10800"/>
                <draw:equation draw:name="f10" draw:formula="21600-?f8 "/>
                <draw:equation draw:name="f11" draw:formula="21600-?f5 "/>
                <draw:handle draw:handle-radius-range-minimum="0" draw:handle-radius-range-maximum="10800" draw:handle-polar="10800 10800" draw:handle-polar-pole-x="10800" draw:handle-polar-pole-y="10800" draw:handle-position="$1 $0" draw:handle-polar-radius="$1" draw:handle-polar-angle="$0"/>
              </draw:enhanced-geometry>
            </draw:custom-shape>
            <draw:custom-shape draw:style-name="gr7" draw:text-style-name="P9" draw:layer="layout" svg:width="5.13cm" svg:height="3.85cm" svg:x="7.857cm" svg:y="22.15cm">
              <text:p text:style-name="P8"><text:span text:style-name="T4">S a l a d a <text:s text:c="2"/>T r o p i c a l</text:span></text:p>
  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handle draw:handle-polar="10800 10800" draw:handle-polar-pole-x="10800" draw:handle-polar-pole-y="10800" draw:handle-position="10800 $0" draw:handle-polar-radius="10800" draw:handle-polar-angle="$0"/>
              </draw:enhanced-geometry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Arial Narrow" svg:font-family="'Arial Narrow'" style:font-adornments="Negrito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275" draw:display-name="Gradient 275" draw:style="axial" draw:start-color="#111111" draw:end-color="#111111" draw:start-intensity="100%" draw:end-intensity="100%" draw:angle="0deg" draw:border="0%">
      <loext:gradient-stop svg:offset="1" loext:color-type="rgb" loext:color-value="#111111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7T21:58:28.587443400</meta:creation-date>
    <dc:date>2026-02-01T21:13:47.544907400</dc:date>
    <meta:editing-duration>PT47M34S</meta:editing-duration>
    <meta:editing-cycles>14</meta:editing-cycles>
    <meta:generator>LibreOffice/25.8.4.2$Windows_X86_64 LibreOffice_project/290daaa01b999472f0c7a3890eb6a550fd74c6df</meta:generator>
    <meta:document-statistic meta:object-count="109"/>
  </office:meta>
</office:document-meta>
</file>