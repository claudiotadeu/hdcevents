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40000019C8E0A4B74.jpg" manifest:media-type="image/jpeg"/>
  <manifest:file-entry manifest:full-path="Pictures/100000000000024000000360AF605DB0.png" manifest:media-type="image/png"/>
  <manifest:file-entry manifest:full-path="Pictures/10000000000004B0000002A3E7275455.jpg" manifest:media-type="image/jpeg"/>
  <manifest:file-entry manifest:full-path="Pictures/10000000000001900000012C40AE3F8A.png" manifest:media-type="image/png"/>
  <manifest:file-entry manifest:full-path="Pictures/10000000000002A8000001CCB9B561E7.jpg" manifest:media-type="image/jpeg"/>
  <manifest:file-entry manifest:full-path="Pictures/10000000000002E1000001D245F98BCA.jpg" manifest:media-type="image/jpeg"/>
  <manifest:file-entry manifest:full-path="Pictures/10000001000002640000019841A56EA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2.3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fo:min-height="2.1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02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end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 fo:text-align="end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89cm" svg:height="27.659cm" svg:x="1.011cm" svg:y="1.041cm">
          <draw:image xlink:href="Pictures/100000000000024000000360AF605DB0.png" xlink:type="simple" xlink:show="embed" xlink:actuate="onLoad" draw:mime-type="image/png">
            <text:p/>
          </draw:image>
        </draw:frame>
        <draw:frame draw:style-name="gr2" draw:text-style-name="P2" draw:layer="layout" svg:width="3.75cm" svg:height="2.813cm" svg:x="4.25cm" svg:y="9.138cm">
          <draw:image xlink:href="Pictures/10000000000001900000012C40AE3F8A.png" xlink:type="simple" xlink:show="embed" xlink:actuate="onLoad" draw:mime-type="image/png">
            <text:p/>
          </draw:image>
        </draw:frame>
        <draw:frame draw:style-name="gr3" draw:text-style-name="P4" draw:layer="layout" svg:width="9.95cm" svg:height="2.72cm" svg:x="8cm" svg:y="9.2cm">
          <draw:text-box>
            <text:p text:style-name="P3"><text:span text:style-name="T1">Frango Cremoso com Milho</text:span></text:p>
            <text:p text:style-name="P3"><text:span text:style-name="T2">Peito de frango desfiado, maionese light (ou iogurte), milho crocante e cenoura ralada no pão de forma integral.</text:span></text:p>
          </draw:text-box>
        </draw:frame>
        <draw:g draw:style-name="gr4">
          <draw:frame draw:style-name="gr1" draw:text-style-name="P1" draw:layer="layout" svg:width="4.75cm" svg:height="3.563cm" svg:x="12.15cm" svg:y="12cm">
            <draw:image xlink:href="Pictures/10000000000002A8000001CCB9B561E7.jpg" xlink:type="simple" xlink:show="embed" xlink:actuate="onLoad" draw:mime-type="image/jpeg">
              <text:p/>
            </draw:image>
          </draw:frame>
          <draw:frame draw:style-name="gr5" draw:text-style-name="P6" draw:layer="layout" svg:width="9.25cm" svg:height="2.72cm" svg:x="2.9cm" svg:y="12.4cm">
            <draw:text-box>
              <text:p text:style-name="P5"><text:span text:style-name="T1">Atum Tropical</text:span></text:p>
              <text:p text:style-name="P5"><text:span text:style-name="T2">Mousse de atum levemente temperada com cebolinha, toque de limão e fatias finas de cebola roxa.</text:span></text:p>
            </draw:text-box>
          </draw:frame>
        </draw:g>
        <draw:g draw:style-name="gr4">
          <draw:frame draw:style-name="gr1" draw:text-style-name="P1" draw:layer="layout" svg:width="4.15cm" svg:height="3.113cm" svg:x="5.1cm" svg:y="16.1cm">
            <draw:image xlink:href="Pictures/10000000000004B0000002A3E7275455.jpg" xlink:type="simple" xlink:show="embed" xlink:actuate="onLoad" draw:mime-type="image/jpeg">
              <text:p/>
            </draw:image>
          </draw:frame>
          <draw:frame draw:style-name="gr6" draw:text-style-name="P4" draw:layer="layout" svg:width="8.5cm" svg:height="3.25cm" svg:x="9.25cm" svg:y="16.1cm">
            <draw:text-box>
              <text:p text:style-name="P3"><text:span text:style-name="T1">Peito de Peru Real</text:span></text:p>
              <text:p text:style-name="P3"><text:span text:style-name="T2">Fatias de peito de peru defumado, creme de ricota (ou cream cheese) e alface americana fresquinha.</text:span></text:p>
            </draw:text-box>
          </draw:frame>
        </draw:g>
        <draw:g draw:style-name="gr4">
          <draw:frame draw:style-name="gr7" draw:text-style-name="P6" draw:layer="layout" svg:width="7.714cm" svg:height="3.278cm" svg:x="3.536cm" svg:y="19.685cm">
            <draw:text-box>
              <text:p text:style-name="P5"><text:span text:style-name="T3">Ricota c/ Ervas</text:span></text:p>
              <text:p text:style-name="P5"><text:span text:style-name="T2">Creme de ricota artesanal temperado com manjericão, salsa e um fio de azeite extravirgem.</text:span></text:p>
            </draw:text-box>
          </draw:frame>
          <draw:frame draw:style-name="gr1" draw:text-style-name="P1" draw:layer="layout" svg:width="5.25cm" svg:height="2.844cm" svg:x="11.25cm" svg:y="19.65cm">
            <draw:image xlink:href="Pictures/10000000000003040000019C8E0A4B74.jpg" xlink:type="simple" xlink:show="embed" xlink:actuate="onLoad" draw:mime-type="image/jpeg">
              <text:p/>
            </draw:image>
          </draw:frame>
        </draw:g>
        <draw:g draw:style-name="gr4">
          <draw:frame draw:style-name="gr8" draw:text-style-name="P4" draw:layer="layout" svg:width="8cm" svg:height="3.05cm" svg:x="9.15cm" svg:y="23.1cm">
            <draw:text-box>
              <text:p text:style-name="P3"><text:span text:style-name="T3">Tofu</text:span></text:p>
              <text:p text:style-name="P3"><text:span text:style-name="T2">Tofu marinado em ervas finas, homus de grão-de-bico e folhas de rúcula.</text:span></text:p>
            </draw:text-box>
          </draw:frame>
          <draw:frame draw:style-name="gr1" draw:text-style-name="P1" draw:layer="layout" svg:width="4.428cm" svg:height="2.8cm" svg:x="4.65cm" svg:y="23.1cm">
            <draw:image xlink:href="Pictures/10000000000002E1000001D245F98BCA.jpg" xlink:type="simple" xlink:show="embed" xlink:actuate="onLoad" draw:mime-type="image/jpeg">
              <text:p/>
            </draw:image>
          </draw:frame>
        </draw:g>
        <draw:frame draw:style-name="gr1" draw:text-style-name="P1" draw:layer="layout" svg:width="11.912cm" svg:height="7.941cm" svg:x="4.1cm" svg:y="2.35cm">
          <draw:image xlink:href="Pictures/10000001000002640000019841A56EA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9T19:39:33.978925700</meta:creation-date>
    <meta:generator>LibreOffice/25.8.4.2$Windows_X86_64 LibreOffice_project/290daaa01b999472f0c7a3890eb6a550fd74c6df</meta:generator>
    <dc:date>2026-01-19T21:27:04.375772700</dc:date>
    <meta:editing-duration>PT1H25M37S</meta:editing-duration>
    <meta:editing-cycles>16</meta:editing-cycles>
    <meta:print-date>2026-01-19T21:14:17.482298200</meta:print-date>
    <meta:printed-by>Arquivos PDF</meta:printed-by>
    <meta:document-statistic meta:object-count="16"/>
  </office:meta>
</office:document-meta>
</file>