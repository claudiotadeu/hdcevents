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2A3E7275455.jpg" manifest:media-type="image/jpeg"/>
  <manifest:file-entry manifest:full-path="Pictures/10000000000001900000012C40AE3F8A.png" manifest:media-type="image/png"/>
  <manifest:file-entry manifest:full-path="Pictures/10000000000002A8000001CCB9B561E7.jpg" manifest:media-type="image/jpeg"/>
  <manifest:file-entry manifest:full-path="Pictures/10000000000003040000019C8E0A4B74.jpg" manifest:media-type="image/jpeg"/>
  <manifest:file-entry manifest:full-path="Pictures/10000000000002E1000001D245F98BCA.jpg" manifest:media-type="image/jpeg"/>
  <manifest:file-entry manifest:full-path="Pictures/10000001000002640000019841A56EA8.png" manifest:media-type="image/png"/>
  <manifest:file-entry manifest:full-path="Pictures/100000010000024100000361F93E66F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2.4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2.2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.5cm" loext:decorative="false"/>
      <style:paragraph-properties style:writing-mode="lr-tb"/>
    </style:style>
    <style:style style:name="P1" style:family="paragraph">
      <loext:graphic-properties draw:opacity="100%"/>
      <style:paragraph-properties fo:text-align="center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 fo:text-align="end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 fo:text-align="end"/>
      <style:text-properties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draw:style-name="gr1">
          <draw:frame draw:style-name="gr2" draw:text-style-name="P1" draw:layer="layout" svg:width="3.865cm" svg:height="2.813cm" svg:x="3.75cm" svg:y="9.438cm">
            <draw:image xlink:href="Pictures/10000000000001900000012C40AE3F8A.png" xlink:type="simple" xlink:show="embed" xlink:actuate="onLoad" draw:mime-type="image/png">
              <text:p/>
            </draw:image>
          </draw:frame>
          <draw:frame draw:style-name="gr3" draw:text-style-name="P3" draw:layer="layout" svg:width="9.535cm" svg:height="2.72cm" svg:x="7.615cm" svg:y="9.5cm">
            <draw:text-box>
              <text:p text:style-name="P2"><text:span text:style-name="T1">Frango Cremoso com Milho</text:span></text:p>
              <text:p text:style-name="P2"><text:span text:style-name="T2">Peito de frango desfiado, maionese light, milho crocante e cenoura ralada no pão de forma.</text:span></text:p>
            </draw:text-box>
          </draw:frame>
        </draw:g>
        <draw:g draw:style-name="gr1">
          <draw:frame draw:style-name="gr4" draw:text-style-name="P4" draw:layer="layout" svg:width="5.123cm" svg:height="3.563cm" svg:x="13.477cm" svg:y="12.2cm">
            <draw:image xlink:href="Pictures/10000000000002A8000001CCB9B561E7.jpg" xlink:type="simple" xlink:show="embed" xlink:actuate="onLoad" draw:mime-type="image/jpeg">
              <text:p/>
            </draw:image>
          </draw:frame>
          <draw:frame draw:style-name="gr3" draw:text-style-name="P6" draw:layer="layout" svg:width="11cm" svg:height="2.72cm" svg:x="2.5cm" svg:y="13cm">
            <draw:text-box>
              <text:p text:style-name="P5"><text:span text:style-name="T1">Atum Tropical</text:span></text:p>
              <text:p text:style-name="P5"><text:span text:style-name="T2">Mousse de atum levemente temperada com cebolinha, toque de limão e fatias finas de cebola roxa.</text:span></text:p>
            </draw:text-box>
          </draw:frame>
        </draw:g>
        <draw:frame draw:style-name="gr4" draw:text-style-name="P4" draw:layer="layout" svg:width="3.817cm" svg:height="2.863cm" svg:x="12.683cm" svg:y="20.137cm">
          <draw:image xlink:href="Pictures/10000000000004B0000002A3E7275455.jpg" xlink:type="simple" xlink:show="embed" xlink:actuate="onLoad" draw:mime-type="image/jpeg">
            <text:p/>
          </draw:image>
        </draw:frame>
        <draw:frame draw:style-name="gr5" draw:text-style-name="P6" draw:layer="layout" svg:width="9.1cm" svg:height="2.5cm" svg:x="3.65cm" svg:y="20.25cm">
          <draw:text-box>
            <text:p text:style-name="P5"><text:span text:style-name="T1">Peito de Peru Real</text:span></text:p>
            <text:p text:style-name="P5"><text:span text:style-name="T2">Fatias de peito de peru defumado, creme de ricota e alface americana fresquinha.</text:span></text:p>
          </draw:text-box>
        </draw:frame>
        <draw:g draw:style-name="gr1">
          <draw:frame draw:style-name="gr6" draw:text-style-name="P3" draw:layer="layout" svg:width="10.25cm" svg:height="2.75cm" svg:x="8cm" svg:y="16.25cm">
            <draw:text-box>
              <text:p text:style-name="P2"><text:span text:style-name="T3">Ricota c/ Ervas</text:span></text:p>
              <text:p text:style-name="P2"><text:span text:style-name="T2">Creme de ricota artesanal temperado com manjericão, salsa e um fio de azeite extravirgem.</text:span></text:p>
            </draw:text-box>
          </draw:frame>
          <draw:frame draw:style-name="gr4" draw:text-style-name="P4" draw:layer="layout" svg:width="5.25cm" svg:height="2.844cm" svg:x="2.75cm" svg:y="16.25cm">
            <draw:image xlink:href="Pictures/10000000000003040000019C8E0A4B74.jpg" xlink:type="simple" xlink:show="embed" xlink:actuate="onLoad" draw:mime-type="image/jpeg">
              <text:p/>
            </draw:image>
          </draw:frame>
        </draw:g>
        <draw:frame draw:style-name="gr5" draw:text-style-name="P3" draw:layer="layout" svg:width="9.75cm" svg:height="2.5cm" svg:x="7.25cm" svg:y="23.95cm">
          <draw:text-box>
            <text:p text:style-name="P2"><text:span text:style-name="T3">Tofu</text:span></text:p>
            <text:p text:style-name="P2"><text:span text:style-name="T2">Tofu marinado em ervas finas, homus de grão-de-bico e folhas de rúcula.</text:span></text:p>
          </draw:text-box>
        </draw:frame>
        <draw:frame draw:style-name="gr4" draw:text-style-name="P4" draw:layer="layout" svg:width="4.428cm" svg:height="2.8cm" svg:x="2.8cm" svg:y="24.15cm">
          <draw:image xlink:href="Pictures/10000000000002E1000001D245F98BCA.jpg" xlink:type="simple" xlink:show="embed" xlink:actuate="onLoad" draw:mime-type="image/jpeg">
            <text:p/>
          </draw:image>
        </draw:frame>
        <draw:frame draw:style-name="gr4" draw:text-style-name="P4" draw:layer="layout" svg:width="11.912cm" svg:height="7.941cm" svg:x="4.1cm" svg:y="2.35cm">
          <draw:image xlink:href="Pictures/10000001000002640000019841A56EA8.png" xlink:type="simple" xlink:show="embed" xlink:actuate="onLoad" draw:mime-type="image/png">
            <text:p/>
          </draw:image>
        </draw:frame>
        <draw:frame draw:style-name="gr4" draw:text-style-name="P4" draw:layer="layout" svg:width="19cm" svg:height="27.735cm" svg:x="1cm" svg:y="1cm">
          <draw:image xlink:href="Pictures/100000010000024100000361F93E66F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9T19:39:33.978925700</meta:creation-date>
    <meta:generator>LibreOffice/25.8.4.2$Windows_X86_64 LibreOffice_project/290daaa01b999472f0c7a3890eb6a550fd74c6df</meta:generator>
    <dc:date>2026-01-27T21:43:51.569021500</dc:date>
    <meta:editing-duration>P8DT1H42M22S</meta:editing-duration>
    <meta:editing-cycles>20</meta:editing-cycles>
    <meta:print-date>2026-01-19T21:36:22.098543400</meta:print-date>
    <meta:printed-by>Arquivos PDF</meta:printed-by>
    <meta:document-statistic meta:object-count="15"/>
  </office:meta>
</office:document-meta>
</file>