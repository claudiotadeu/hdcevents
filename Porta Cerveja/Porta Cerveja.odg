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2000002CE4B5D4E0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4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 loext:opacity="100%"/>
    </style:style>
    <style:style style:name="P3" style:family="paragraph">
      <loext:graphic-properties draw:fill="none" draw:fill-color="#ffffff"/>
      <style:text-properties fo:color="#ff0000" loext:opacity="100%" style:font-name="Lucida Handwriting" fo:font-size="16pt" fo:font-weight="bold" style:font-size-asian="16pt" style:font-size-complex="16pt"/>
    </style:style>
    <style:style style:name="T1" style:family="text">
      <style:text-properties style:font-name="Lucida Handwriting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frame draw:style-name="gr2" draw:text-style-name="P1" draw:layer="layout" svg:width="2.261cm" svg:height="6.614cm" svg:x="7.141cm" svg:y="1.1cm">
            <draw:image xlink:href="Pictures/1000000100000102000002CE4B5D4E0C.png" xlink:type="simple" xlink:show="embed" xlink:actuate="onLoad" draw:mime-type="image/png">
              <text:p/>
            </draw:image>
          </draw:frame>
          <draw:frame draw:style-name="gr3" draw:text-style-name="P3" draw:layer="layout" svg:width="5.25cm" svg:height="1.08cm" svg:x="6cm" svg:y="7.703cm">
            <draw:text-box>
              <text:p text:style-name="P2"><text:span text:style-name="T1">Paracuru - Ce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8T16:35:13.686841000</meta:creation-date>
    <dc:date>2026-02-09T17:50:25.307129800</dc:date>
    <meta:editing-duration>PT21M27S</meta:editing-duration>
    <meta:editing-cycles>4</meta:editing-cycles>
    <meta:generator>LibreOffice/25.8.4.2$Windows_X86_64 LibreOffice_project/290daaa01b999472f0c7a3890eb6a550fd74c6df</meta:generator>
    <meta:document-statistic meta:object-count="3"/>
  </office:meta>
</office:document-meta>
</file>