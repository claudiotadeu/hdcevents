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634" officeooo:paragraph-rsid="0014e634"/>
    </style:style>
    <style:style style:name="P2" style:family="paragraph" style:parent-style-name="Standard">
      <style:text-properties officeooo:rsid="00169af7" officeooo:paragraph-rsid="00169af7"/>
    </style:style>
    <style:style style:name="P3" style:family="paragraph" style:parent-style-name="Standard">
      <style:text-properties officeooo:rsid="00169af7" officeooo:paragraph-rsid="001827cc"/>
    </style:style>
    <style:style style:name="T1" style:family="text">
      <style:text-properties officeooo:rsid="00169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Charm Food</text:p>
      <text:p text:style-name="P1"/>
      <text:p text:style-name="P1">Objetivo:</text:p>
      <text:p text:style-name="P1">Site destinado a Administração de grupo de empresas no ramo de alimentos Food.</text:p>
      <text:p text:style-name="P1"/>
      <text:p text:style-name="P1">Etapas do Projeto:</text:p>
      <text:p text:style-name="P1">1 – Criar Cardápio digital;</text:p>
      <text:p text:style-name="P1"><text:span text:style-name="T1">1.1 – Descrição Geral</text:span></text:p>
      <text:p text:style-name="P2">a) Plataforma Que possibilitará o cadastro de vários Cardápios de várias empresas.</text:p>
      <text:p text:style-name="P2"/>
      <text:p text:style-name="P2">b) Criar Base de Dados</text:p>
      <text:p text:style-name="P2">Cadastro de Parceiros:</text:p>
      <text:p text:style-name="P2">1 – cpf_cnpj</text:p>
      <text:p text:style-name="P2">2 – razao_social</text:p>
      <text:p text:style-name="P2">3 – nome_fantasia</text:p>
      <text:p text:style-name="P2">4 – e-mail</text:p>
      <text:p text:style-name="P2">5 – fone</text:p>
      <text:p text:style-name="P2">6 – responsavel</text:p>
      <text:p text:style-name="P2">7 – contato_responsavel2</text:p>
      <text:p text:style-name="P2">8 – logradouro</text:p>
      <text:p text:style-name="P2">9 – numero</text:p>
      <text:p text:style-name="P2">10 – complemento</text:p>
      <text:p text:style-name="P2">11 – bairro</text:p>
      <text:p text:style-name="P2">12 – cidade</text:p>
      <text:p text:style-name="P2">13 – uf</text:p>
      <text:p text:style-name="P2">14 – status</text:p>
      <text:p text:style-name="P2"/>
      <text:p text:style-name="P2">Cadastro de Categorias</text:p>
      <text:p text:style-name="P2">1 – nome</text:p>
      <text:p text:style-name="P2">2 – status</text:p>
      <text:p text:style-name="P2"/>
      <text:p text:style-name="P2">Cadastro de Produtos:</text:p>
      <text:p text:style-name="P2">1 – nome</text:p>
      <text:p text:style-name="P2">2 – descricao</text:p>
      <text:p text:style-name="P2">3 – status</text:p>
      <text:p text:style-name="P3">4 – parceiro</text:p>
      <text:p text:style-name="P3">5 – categoria</text:p>
      <text:p text:style-name="P3">6 – und</text:p>
      <text:p text:style-name="P3">7 – valor_unitario</text:p>
      <text:p text:style-name="P3">8 – fracionavel</text:p>
      <text:p text:style-name="P2"/>
      <text:p text:style-name="P2"/>
      <text:p text:style-name="P2"/>
      <text:p text:style-name="P1"/>
      <text:p text:style-name="P1">2 – Criar Atendimentos;</text:p>
      <text:p text:style-name="P1">3 – Controlar Estoque;</text:p>
      <text:p text:style-name="P1">4 – Controlar Financeiro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22:12:19.739505300</meta:creation-date>
    <dc:date>2026-02-18T22:31:14.803715500</dc:date>
    <meta:editing-duration>PT4M55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38" meta:word-count="110" meta:character-count="706" meta:non-whitespace-character-count="605"/>
  </office:meta>
</office:document-meta>
</file>