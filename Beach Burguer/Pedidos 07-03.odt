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ceefb" style:font-size-asian="14pt" style:font-size-complex="14pt"/>
    </style:style>
    <style:style style:name="P2" style:family="paragraph" style:parent-style-name="Standard">
      <style:text-properties fo:font-size="14pt" officeooo:rsid="001de6f7" officeooo:paragraph-rsid="001de6f7" style:font-size-asian="14pt" style:font-size-complex="14pt"/>
    </style:style>
    <style:style style:name="P3" style:family="paragraph" style:parent-style-name="Standard">
      <style:text-properties fo:font-size="14pt" officeooo:paragraph-rsid="001de6f7" style:font-size-asian="14pt" style:font-size-complex="14pt"/>
    </style:style>
    <style:style style:name="P4" style:family="paragraph" style:parent-style-name="Standard">
      <style:text-properties fo:font-size="14pt" officeooo:paragraph-rsid="0018c75c" style:font-size-asian="14pt" style:font-size-complex="14pt"/>
    </style:style>
    <style:style style:name="P5" style:family="paragraph" style:parent-style-name="Standard">
      <style:text-properties fo:font-size="14pt" officeooo:rsid="0018c75c" officeooo:paragraph-rsid="0018c75c" style:font-size-asian="14pt" style:font-size-complex="14pt"/>
    </style:style>
    <style:style style:name="P6" style:family="paragraph" style:parent-style-name="Standard">
      <style:text-properties fo:font-size="14pt" officeooo:rsid="001ab7d0" officeooo:paragraph-rsid="001ab7d0" style:font-size-asian="14pt" style:font-size-complex="14pt"/>
    </style:style>
    <style:style style:name="P7" style:family="paragraph" style:parent-style-name="Standard">
      <style:text-properties fo:font-size="14pt" officeooo:paragraph-rsid="001c58c3" style:font-size-asian="14pt" style:font-size-complex="14pt"/>
    </style:style>
    <style:style style:name="P8" style:family="paragraph" style:parent-style-name="Standard">
      <style:paragraph-properties fo:break-before="page"/>
      <style:text-properties fo:font-size="14pt" officeooo:paragraph-rsid="001de6f7" style:font-size-asian="14pt" style:font-size-complex="14pt"/>
    </style:style>
    <style:style style:name="P9" style:family="paragraph" style:parent-style-name="Standard">
      <style:text-properties fo:font-size="14pt" officeooo:rsid="001c58c3" officeooo:paragraph-rsid="001c58c3" style:font-size-asian="14pt" style:font-size-complex="14pt"/>
    </style:style>
    <style:style style:name="P10" style:family="paragraph" style:parent-style-name="Standard">
      <style:text-properties fo:font-size="14pt" officeooo:rsid="0018c75c" officeooo:paragraph-rsid="001ceefb" style:font-size-asian="14pt" style:font-size-complex="14pt"/>
    </style:style>
    <style:style style:name="T1" style:family="text">
      <style:text-properties officeooo:rsid="001c58c3"/>
    </style:style>
    <style:style style:name="T2" style:family="text">
      <style:text-properties officeooo:rsid="0018c75c"/>
    </style:style>
    <style:style style:name="T3" style:family="text">
      <style:text-properties officeooo:rsid="001ab7d0"/>
    </style:style>
    <style:style style:name="T4" style:family="text">
      <style:text-properties officeooo:rsid="001ceefb"/>
    </style:style>
    <style:style style:name="T5" style:family="text">
      <style:text-properties officeooo:rsid="001de6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FESSOR RODRIGO</text:span></text:p>
      <text:p text:style-name="P1"><text:span text:style-name="T1">BOVINO</text:span></text:p>
      <text:p text:style-name="P1"><text:span text:style-name="T1"><text:tab/>C/ OVO<text:tab/><text:tab/><text:tab/><text:tab/><text:tab/><text:tab/><text:tab/></text:span>27,50</text:p>
      <text:p text:style-name="P2">___________________________________________________________________</text:p>
      <text:p text:style-name="P3"/>
      <text:p text:style-name="P1"><text:span text:style-name="T1">THIAGO IRISMAR</text:span></text:p>
      <text:p text:style-name="P1"><text:span text:style-name="T1">BOVINO</text:span></text:p>
      <text:p text:style-name="P1"><text:span text:style-name="T1"><text:tab/>C/ OVO<text:tab/><text:tab/><text:tab/><text:tab/><text:tab/><text:tab/><text:tab/></text:span>27,50</text:p>
      <text:p text:style-name="P2">___________________________________________________________________</text:p>
      <text:p text:style-name="P3"/>
      <text:p text:style-name="P4"><text:span text:style-name="T2">ARTHUR</text:span><text:line-break/><text:line-break/>PRA ENTREGA: R. DOUTOR ANTÔNIO MARDEN DE CARVALHO - 100 (BAIRRO DA TORRE)</text:p>
      <text:p text:style-name="P4"/>
      <text:p text:style-name="P4">REGI:</text:p>
      <text:p text:style-name="P5">BOVINO</text:p>
      <text:p text:style-name="P4"><text:span text:style-name="T2"><text:tab/>C/ BACON</text:span></text:p>
      <text:p text:style-name="P3"><text:span text:style-name="T2"><text:tab/>C/ CALABRESA<text:tab/><text:tab/><text:tab/><text:tab/><text:tab/><text:tab/></text:span>30,00<text:line-break/>-------------------------------------------------------------------------------------------------------</text:p>
      <text:p text:style-name="P3"><text:line-break/><text:span text:style-name="T2">LUIZ</text:span>:</text:p>
      <text:p text:style-name="P4"><text:span text:style-name="T2">BOVINO DEFUMADO</text:span></text:p>
      <text:p text:style-name="P3"><text:span text:style-name="T2"><text:tab/>C/ CEBOLA CARAMELIZADA<text:tab/><text:tab/><text:tab/><text:tab/></text:span>32,00<text:line-break/>-------------------------------------------------------------------------------------------------------</text:p>
      <text:p text:style-name="P3"><text:line-break/><text:span text:style-name="T3">REJANE:</text:span></text:p>
      <text:p text:style-name="P3"><text:span text:style-name="T3">BOVINO<text:tab/><text:tab/><text:tab/><text:tab/><text:tab/><text:tab/><text:tab/><text:tab/></text:span>25,50 <text:line-break/>-------------------------------------------------------------------------------------------------------</text:p>
      <text:p text:style-name="P3"><text:line-break/><text:span text:style-name="T3">MARIA:</text:span></text:p>
      <text:p text:style-name="P6">BOVINO</text:p>
      <text:p text:style-name="P6"><text:tab/>C BACON</text:p>
      <text:p text:style-name="P7"><text:span text:style-name="T3"><text:tab/>C/ CEBOLA CARAMELIZADA<text:tab/><text:tab/><text:tab/><text:tab/></text:span>31,00</text:p>
      <text:p text:style-name="P3">-------------------------------------------------------------------------------------------------------</text:p>
      <text:p text:style-name="P3"/>
      <text:p text:style-name="P7">PRA ENTREGA: R. ANTÔNIO TABOSA LEITÃO, 141<text:line-break/>(RUA DA ANTIGA FÁBRICA DE CASTANHA)</text:p>
      <text:p text:style-name="P7"/>
      <text:p text:style-name="P7"><text:span text:style-name="T1">MAGNOLIA:</text:span></text:p>
      <text:p text:style-name="P7"><text:span text:style-name="T1">BOVINO</text:span></text:p>
      <text:p text:style-name="P3"><text:span text:style-name="T1"><text:tab/>S/ PRESUNTO<text:tab/><text:tab/><text:tab/><text:tab/><text:tab/><text:tab/></text:span>25,50<text:line-break/>-------------------------------------------------------------------------------------------------------</text:p>
      <text:p text:style-name="P3"><text:line-break/><text:span text:style-name="T1">INGRYD:</text:span></text:p>
      <text:p text:style-name="P3"><text:span text:style-name="T1">BOVINO <text:tab/><text:tab/><text:tab/><text:tab/><text:tab/><text:tab/><text:tab/><text:tab/></text:span>25,50<text:line-break/><text:line-break/></text:p>
      <text:p text:style-name="P8"><text:span text:style-name="T1">ENTREGA NA </text:span>CASA DO BRUNO:<text:line-break/><text:span text:style-name="T1">ARTHUR</text:span>:</text:p>
      <text:p text:style-name="P9">BOVINO DEFUMADO</text:p>
      <text:p text:style-name="P9"><text:tab/>C/ CEBOLA CARAMELIZADA</text:p>
      <text:p text:style-name="P7"><text:span text:style-name="T1"><text:tab/>C/ BACON<text:tab/><text:tab/><text:tab/><text:tab/><text:tab/><text:tab/><text:tab/></text:span>33,50</text:p>
      <text:p text:style-name="P7"/>
      <text:p text:style-name="P7"><text:span text:style-name="T1">BOVINO</text:span></text:p>
      <text:p text:style-name="P7"><text:span text:style-name="T1"><text:tab/>C/ ANEIS DE CEBOLA<text:tab/><text:tab/><text:tab/><text:tab/><text:tab/></text:span>37,50</text:p>
      <text:p text:style-name="P2">___________________________________________________________________</text:p>
      <text:p text:style-name="P7"/>
      <text:p text:style-name="P10">MANUELA</text:p>
      <text:p text:style-name="P10"/>
      <text:p text:style-name="P10"/>
      <text:p text:style-name="P1">4 <text:span text:style-name="T2">BOVINO</text:span><text:line-break/><text:tab/>1 DELES COM BACON</text:p>
      <text:p text:style-name="P2">___________________________________________________________________</text:p>
      <text:p text:style-name="P2"/>
      <text:p text:style-name="P1"><text:span text:style-name="T2">PEDRO LUCAS</text:span><text:line-break/><text:line-break/><text:span text:style-name="T2">BOVINO</text:span> <text:s/><text:tab/><text:tab/><text:tab/><text:tab/><text:tab/><text:tab/><text:tab/><text:tab/>25,50<text:line-break/><text:line-break/><text:span text:style-name="T2">BOVINO DEFUMADO</text:span></text:p>
      <text:p text:style-name="P1"><text:tab/>C/ CEBOLA CRUA <text:tab/><text:tab/><text:tab/><text:tab/><text:tab/>28,50</text:p>
      <text:p text:style-name="P2">____________________________________________________________________</text:p>
      <text:p text:style-name="P3"/>
      <text:p text:style-name="P3"/>
      <text:p text:style-name="P1"><text:span text:style-name="T2">GABRIEL</text:span><text:line-break/><text:line-break/><text:span text:style-name="T2">BOVINO</text:span></text:p>
      <text:p text:style-name="P1"><text:tab/>C/ BACON<text:tab/><text:tab/><text:tab/><text:tab/><text:tab/><text:tab/><text:tab/>27,50</text:p>
      <text:p text:style-name="P1"><text:line-break/><text:span text:style-name="T2">BOVINO DEFUMADO</text:span></text:p>
      <text:p text:style-name="P1"><text:tab/>(SEM ALFACE, TOMATE)</text:p>
      <text:p text:style-name="P1"><text:tab/>C/ BACON,</text:p>
      <text:p text:style-name="P1"><text:span text:style-name="T4"><text:tab/>C/ </text:span>OVO</text:p>
      <text:p text:style-name="P1"><text:tab/><text:span text:style-name="T4">C/</text:span> CALABRESA <text:s/><text:tab/><text:tab/><text:tab/><text:tab/><text:tab/><text:tab/> 35,00<text:line-break/><text:line-break/><text:span text:style-name="T2">BOVINO DEFUMADO</text:span></text:p>
      <text:p text:style-name="P3"><text:tab/>C/ BACON<text:tab/><text:tab/><text:tab/><text:tab/><text:tab/><text:tab/><text:tab/>30,50<text:line-break/><text:span text:style-name="T5">___________________________________________________________________</text:span></text:p>
      <text:p text:style-name="P3"><text:line-break/><text:line-break/><text:span text:style-name="T2">BRUNNO</text:span></text:p>
      <text:p text:style-name="P1"/>
      <text:p text:style-name="P1"><text:span text:style-name="T2">BOVINO</text:span></text:p>
      <text:p text:style-name="P1"><text:tab/>C BACON<text:tab/><text:tab/><text:tab/><text:tab/><text:tab/><text:tab/><text:tab/>27,50<text:line-break/><text:line-break/><text:span text:style-name="T2">BOVINO DEFUMADO</text:span></text:p>
      <text:p text:style-name="P1"><text:tab/>C/ OVO<text:tab/><text:tab/><text:tab/><text:tab/><text:tab/><text:tab/><text:tab/>30,50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35cm" fo:margin-bottom="0.57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06:44:01.178635400</meta:creation-date>
    <dc:date>2026-03-07T07:22:13.249998500</dc:date>
    <meta:editing-duration>PT24M26S</meta:editing-duration>
    <meta:editing-cycles>6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54" meta:word-count="152" meta:character-count="1872" meta:non-whitespace-character-count="1638"/>
  </office:meta>
</office:document-meta>
</file>