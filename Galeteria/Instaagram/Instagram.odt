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Ótimo. Vamos criar o <text:span text:style-name="Strong_20_Emphasis">MODELO PROFISSIONAL DE INSTAGRAM</text:span> para o <text:span text:style-name="Strong_20_Emphasis">GALETOS BEACH</text:span>, padrão rede, focado em público <text:span text:style-name="Strong_20_Emphasis">nível médio</text:span> e alto volume de vendas.</text:p>
      <text:p text:style-name="Horizontal_20_Line"/>
      <text:h text:style-name="Heading_20_1" text:outline-level="1">🍗 MODELO OFICIAL INSTAGRAM – GALETOS BEACH</text:h>
      <text:p text:style-name="Horizontal_20_Line"/>
      <text:h text:style-name="Heading_20_2" text:outline-level="2">✅ 1. Nome do perfil</text:h>
      <text:p text:style-name="Text_20_body"><text:span text:style-name="Strong_20_Emphasis">@galetosbeach</text:span></text:p>
      <text:p text:style-name="Text_20_body">ou se estiver ocupado:</text:p>
      <text:p text:style-name="Text_20_body">@galetosbeach.oficial<text:line-break/>@galetosbeach_[cidade]</text:p>
      <text:p text:style-name="Text_20_body">Exemplo:</text:p>
      <text:p text:style-name="Text_20_body">@galetosbeach.fortaleza</text:p>
      <text:p text:style-name="Horizontal_20_Line"/>
      <text:h text:style-name="Heading_20_2" text:outline-level="2">✅ 2. Foto do perfil</text:h>
      <text:p text:style-name="Text_20_body">Use:</text:p>
      <text:list text:style-name="L1">
        <text:list-item>
          <text:p text:style-name="P1">fundo preto</text:p>
        </text:list-item>
        <text:list-item>
          <text:p text:style-name="P1">logo dourada</text:p>
        </text:list-item>
        <text:list-item>
          <text:p text:style-name="P1">simples</text:p>
        </text:list-item>
        <text:list-item>
          <text:p text:style-name="P1">sem poluição</text:p>
        </text:list-item>
      </text:list>
      <text:p text:style-name="Text_20_body">Visual limpo = marca forte</text:p>
      <text:p text:style-name="Horizontal_20_Line"/>
      <text:h text:style-name="Heading_20_2" text:outline-level="2">✅ 3. BIO PROFISSIONAL (copiar e colar)</text:h>
      <text:p text:style-name="Text_20_body">Aqui está pronta:</text:p>
      <text:section text:style-name="Sect1" text:name="writing-block-b1b280de-24d0-4646-a270-7a1a842bba45">
        <text:p text:style-name="P2">Escrita</text:p>
        <text:p text:style-name="Horizontal_20_Line"/>
        <text:p text:style-name="Text_20_body">🍗 Galetos Beach<text:line-break/>🔥 Assado no ponto. Sabor no máximo.<text:line-break/>👑 by CHARM FOOD<text:line-break/>📍 São Gonçalo do Amarante - CE<text:line-break/>📲 Peça pelo WhatsApp 👇</text:p>
      </text:section>
      <text:p text:style-name="Text_20_body"><text:soft-page-break/>(Substitua cidade se necessário)</text:p>
      <text:p text:style-name="Horizontal_20_Line"/>
      <text:h text:style-name="Heading_20_2" text:outline-level="2">✅ 4. Link</text:h>
      <text:p text:style-name="Text_20_body">Link direto WhatsApp:</text:p>
      <text:p text:style-name="Text_20_body">Exemplo:</text:p>
      <text:p text:style-name="Text_20_body">wa.me/5585988887777</text:p>
      <text:p text:style-name="Text_20_body">(coloque seu número)</text:p>
      <text:p text:style-name="Horizontal_20_Line"/>
      <text:h text:style-name="Heading_20_1" text:outline-level="1">✅ 5. Destaques (ESSENCIAL)</text:h>
      <text:p text:style-name="Text_20_body">Crie esses destaques:</text:p>
      <text:p text:style-name="Horizontal_20_Line"/>
      <text:h text:style-name="Heading_20_2" text:outline-level="2">🍗 CARDÁPIO</text:h>
      <text:p text:style-name="Text_20_body">Fotos dos produtos</text:p>
      <text:p text:style-name="Horizontal_20_Line"/>
      <text:h text:style-name="Heading_20_2" text:outline-level="2">🔥 OFERTAS</text:h>
      <text:p text:style-name="Text_20_body">Promoções</text:p>
      <text:p text:style-name="Horizontal_20_Line"/>
      <text:h text:style-name="Heading_20_2" text:outline-level="2">⭐ CLIENTES</text:h>
      <text:p text:style-name="Text_20_body">Reposts</text:p>
      <text:p text:style-name="Horizontal_20_Line"/>
      <text:h text:style-name="Heading_20_2" text:outline-level="2">📍 LOCAL</text:h>
      <text:p text:style-name="Text_20_body">Mapa e endereço</text:p>
      <text:p text:style-name="Horizontal_20_Line"/>
      <text:h text:style-name="Heading_20_2" text:outline-level="2">👨‍🍳 BASTIDORES</text:h>
      <text:p text:style-name="Text_20_body">Frango assando (vende MUITO)</text:p>
      <text:p text:style-name="Horizontal_20_Line"/>
      <text:h text:style-name="Heading_20_1" text:outline-level="1"><text:soft-page-break/>✅ 6. PRIMEIROS 9 POSTS (ESTRATÉGIA PROFISSIONAL)</text:h>
      <text:p text:style-name="Text_20_body">Ordem:</text:p>
      <text:p text:style-name="Horizontal_20_Line"/>
      <text:p text:style-name="Text_20_body">Post 1<text:line-break/>Logo</text:p>
      <text:p text:style-name="Text_20_body">Post 2<text:line-break/>Frango inteiro</text:p>
      <text:p text:style-name="Text_20_body">Post 3<text:line-break/>Frango cortado</text:p>
      <text:p text:style-name="Text_20_body">Post 4<text:line-break/>Promoção</text:p>
      <text:p text:style-name="Text_20_body">Post 5<text:line-break/>Frango girando na máquina</text:p>
      <text:p text:style-name="Text_20_body">Post 6<text:line-break/>Equipe</text:p>
      <text:p text:style-name="Text_20_body">Post 7<text:line-break/>Combo</text:p>
      <text:p text:style-name="Text_20_body">Post 8<text:line-break/>Cliente feliz</text:p>
      <text:p text:style-name="Text_20_body">Post 9<text:line-break/>Chamada WhatsApp</text:p>
      <text:p text:style-name="Horizontal_20_Line"/>
      <text:h text:style-name="Heading_20_1" text:outline-level="1">✅ 7. FRASES PRONTAS PARA POST</text:h>
      <text:p text:style-name="Text_20_body">Copie e use:</text:p>
      <text:p text:style-name="Horizontal_20_Line"/>
      <text:h text:style-name="Heading_20_2" text:outline-level="2">Post exemplo 1</text:h>
      <text:section text:style-name="Sect1" text:name="Seção1">
        <text:p text:style-name="P2"><text:bookmark text:name="writing-block-b1b280de-24d0-4646-a270-7a1a842bba45"/>Escrita</text:p>
        <text:p text:style-name="Horizontal_20_Line"/>
        <text:p text:style-name="Text_20_body">O verdadeiro sabor do frango assado está aqui. 🔥🍗</text:p>
        <text:p text:style-name="Text_20_body">Galetos Beach<text:line-break/>Assado no ponto. Sabor no máximo.</text:p>
        <text:p text:style-name="Text_20_body">Peça agora no WhatsApp.</text:p>
      </text:section>
      <text:p text:style-name="Horizontal_20_Line"><text:soft-page-break/></text:p>
      <text:h text:style-name="Heading_20_2" text:outline-level="2">Post exemplo 2</text:h>
      <text:section text:style-name="Sect1" text:name="Seção2">
        <text:p text:style-name="P2"><text:bookmark text:name="writing-block-b1b280de-24d0-4646-a270-7a1a842bba45 Copia 1"/>Escrita</text:p>
        <text:p text:style-name="Horizontal_20_Line"/>
        <text:p text:style-name="Text_20_body">⚠️ AVISO:</text:p>
        <text:p text:style-name="Text_20_body">Esse frango vicia.</text:p>
        <text:p text:style-name="Text_20_body">Galetos Beach<text:line-break/>by CHARM FOOD</text:p>
      </text:section>
      <text:p text:style-name="Horizontal_20_Line"/>
      <text:h text:style-name="Heading_20_2" text:outline-level="2">Post exemplo 3</text:h>
      <text:section text:style-name="Sect1" text:name="Seção3">
        <text:p text:style-name="P2"><text:bookmark text:name="writing-block-b1b280de-24d0-4646-a270-7a1a842bba45 Copia 2"/>Escrita</text:p>
        <text:p text:style-name="Horizontal_20_Line"/>
        <text:p text:style-name="Text_20_body">Frango dourado.<text:line-break/>Suculento.<text:line-break/>Perfeito.</text:p>
        <text:p text:style-name="Text_20_body">Você merece isso hoje. 🍗</text:p>
      </text:section>
      <text:p text:style-name="Horizontal_20_Line"/>
      <text:h text:style-name="Heading_20_1" text:outline-level="1">✅ 8. CORES DO INSTAGRAM</text:h>
      <text:p text:style-name="Text_20_body">Sempre usar:</text:p>
      <text:p text:style-name="Text_20_body">preto<text:line-break/>dourado<text:line-break/>vermelho fogo</text:p>
      <text:p text:style-name="Text_20_body">Isso cria identidade.</text:p>
      <text:p text:style-name="Horizontal_20_Line"/>
      <text:h text:style-name="Heading_20_1" text:outline-level="1">✅ 9. FREQUÊNCIA</text:h>
      <text:p text:style-name="Text_20_body">Postar:</text:p>
      <text:p text:style-name="Text_20_body">1 a 2 por dia</text:p>
      <text:p text:style-name="Text_20_body">ou mínimo:</text:p>
      <text:p text:style-name="Text_20_body">4 por semana</text:p>
      <text:p text:style-name="Horizontal_20_Line"/>
      <text:h text:style-name="Heading_20_1" text:outline-level="1"><text:soft-page-break/>✅ 10. RESULTADO ESPERADO</text:h>
      <text:p text:style-name="Text_20_body">Em 30 dias:</text:p>
      <text:p text:style-name="Text_20_body">perfil forte<text:line-break/>marca profissional<text:line-break/>mais vendas<text:line-break/>mais confiança</text:p>
      <text:p text:style-name="Horizontal_20_Line"/>
      <text:h text:style-name="Heading_20_1" text:outline-level="1">🚀 Posso criar agora:</text:h>
      <text:p text:style-name="Text_20_body">o <text:span text:style-name="Strong_20_Emphasis">MODELO DE POST PRONTO (arte + frase + estrutura)</text:span></text:p>
      <text:p text:style-name="Text_20_body">Escolha:</text:p>
      <text:p text:style-name="Text_20_body">1 frango inteiro<text:line-break/>2 promoção<text:line-break/>3 combo<text:line-break/>4 institucional (marca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3T11:32:36.068856300</meta:creation-date>
    <dc:date>2026-02-23T11:32:57.061480500</dc:date>
    <meta:editing-duration>PT25S</meta:editing-duration>
    <meta:editing-cycles>1</meta:editing-cycles>
    <meta:generator>LibreOffice/25.8.4.2$Windows_X86_64 LibreOffice_project/290daaa01b999472f0c7a3890eb6a550fd74c6df</meta:generator>
    <meta:document-statistic meta:table-count="0" meta:image-count="0" meta:object-count="0" meta:page-count="5" meta:paragraph-count="80" meta:word-count="318" meta:character-count="1801" meta:non-whitespace-character-count="1566"/>
  </office:meta>
</office:document-meta>
</file>