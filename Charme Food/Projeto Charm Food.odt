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6.355cm" table:align="left"/>
    </style:style>
    <style:style style:name="Tabela1.A" style:family="table-column">
      <style:table-column-properties style:column-width="3.023cm"/>
    </style:style>
    <style:style style:name="Tabela1.B" style:family="table-column">
      <style:table-column-properties style:column-width="3.332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>
      <style:paragraph-properties fo:margin-top="0cm" fo:margin-bottom="0cm" style:contextual-spacing="false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16" style:family="paragraph" style:parent-style-name="Text_20_body" style:list-style-name="L13"/>
    <style:style style:name="P17" style:family="paragraph" style:parent-style-name="Text_20_body" style:list-style-name="L14"/>
    <style:style style:name="P18" style:family="paragraph" style:parent-style-name="Text_20_body" style:list-style-name="L15"/>
    <style:style style:name="P19" style:family="paragraph" style:parent-style-name="Text_20_body" style:list-style-name="L16"/>
    <style:style style:name="P20" style:family="paragraph" style:parent-style-name="Text_20_body" style:list-style-name="L17"/>
    <style:style style:name="P21" style:family="paragraph" style:parent-style-name="Text_20_body" style:list-style-name="L18"/>
    <style:style style:name="P22" style:family="paragraph" style:parent-style-name="Text_20_body" style:list-style-name="L19"/>
    <style:style style:name="P23" style:family="paragraph" style:parent-style-name="Text_20_body" style:list-style-name="L20"/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ou montando tres negocios paralelos. CharmSalads que trabalha com salada tropical. CharmeDubas que trabalha com Sanduiches Natural e Galetos Beach que trabalha com Frangos assados em Maquinas carnes assadas em geral. A ideia é criar um nome único para o grupo de negocios. Daí surgiu o nome "Charme Food", pois já tenho uma fábrica de sobremesas congeladas com o nome "Charmousse" Preciso de Uma ideia de arte logo marca e logo tipo para "Charme Food".</text:p>
      <text:p text:style-name="Text_20_body">Excelente ideia unificar tudo em <text:span text:style-name="Strong_20_Emphasis">Charme Food</text:span> — isso fortalece sua marca e facilita expansão futura. Vou te passar um <text:span text:style-name="Strong_20_Emphasis">conceito completo de logomarca + logotipo</text:span>, pensado estrategicamente para alimentos diversos (saladas, sanduíches, frango, sobremesas, etc).</text:p>
      <text:p text:style-name="Horizontal_20_Line"/>
      <text:h text:style-name="Heading_20_1" text:outline-level="1">🎨 Conceito de Logo e Logomarca – CHARME FOOD</text:h>
      <text:h text:style-name="Heading_20_2" text:outline-level="2">1. 🧠 Conceito principal da marca</text:h>
      <text:p text:style-name="Text_20_body"><text:span text:style-name="Strong_20_Emphasis">Charme Food = Charme + Sabor + Qualidade + Versatilidade</text:span></text:p>
      <text:p text:style-name="Text_20_body">A marca precisa transmitir:</text:p>
      <text:list text:style-name="L1">
        <text:list-item>
          <text:p text:style-name="P2">Sofisticação acessível</text:p>
        </text:list-item>
        <text:list-item>
          <text:p text:style-name="P2">Apetite</text:p>
        </text:list-item>
        <text:list-item>
          <text:p text:style-name="P2">Confiança</text:p>
        </text:list-item>
        <text:list-item>
          <text:p text:style-name="P2">Modernidade</text:p>
        </text:list-item>
        <text:list-item>
          <text:p text:style-name="P2">Grupo de alimentos</text:p>
        </text:list-item>
      </text:list>
      <text:p text:style-name="Text_20_body">Não pode parecer só salada ou só frango — tem que representar <text:span text:style-name="Strong_20_Emphasis">um grupo completo</text:span>.</text:p>
      <text:p text:style-name="Horizontal_20_Line"/>
      <text:h text:style-name="Heading_20_1" text:outline-level="1">2. 🟡 Ideia visual principal (Logomarca)</text:h>
      <text:h text:style-name="Heading_20_2" text:outline-level="2">Símbolo (ícone)</text:h>
      <text:p text:style-name="Text_20_body">Sugestão forte:</text:p>
      <text:h text:style-name="Heading_20_3" text:outline-level="3">Opção A — Letra C com elementos food dentro</text:h>
      <text:p text:style-name="Text_20_body">Um <text:span text:style-name="Strong_20_Emphasis">C estilizado</text:span> contendo dentro:</text:p>
      <text:list text:style-name="L2">
        <text:list-item>
          <text:p text:style-name="P3">uma folha 🌿</text:p>
        </text:list-item>
        <text:list-item>
          <text:p text:style-name="P3">uma chama 🔥</text:p>
        </text:list-item>
        <text:list-item>
          <text:p text:style-name="P3">um garfo 🍴</text:p>
        </text:list-item>
      </text:list>
      <text:p text:style-name="Text_20_body">Isso representa:</text:p>
      <text:list text:style-name="L3">
        <text:list-item>
          <text:p text:style-name="P4"><text:soft-page-break/>saladas</text:p>
        </text:list-item>
        <text:list-item>
          <text:p text:style-name="P4">frangos assados</text:p>
        </text:list-item>
        <text:list-item>
          <text:p text:style-name="P4">alimentação geral</text:p>
        </text:list-item>
      </text:list>
      <text:p text:style-name="Text_20_body">Formato simples e memorável.</text:p>
      <text:p text:style-name="Horizontal_20_Line"/>
      <text:h text:style-name="Heading_20_3" text:outline-level="3">Opção B — Chapéu de chef estilizado com chama</text:h>
      <text:p text:style-name="Text_20_body">Símbolo misturando:</text:p>
      <text:list text:style-name="L4">
        <text:list-item>
          <text:p text:style-name="P5">chapéu de chef</text:p>
        </text:list-item>
        <text:list-item>
          <text:p text:style-name="P5">chama do fogo</text:p>
        </text:list-item>
        <text:list-item>
          <text:p text:style-name="P5">folha</text:p>
        </text:list-item>
      </text:list>
      <text:p text:style-name="Text_20_body">Representa:</text:p>
      <text:list text:style-name="L5">
        <text:list-item>
          <text:p text:style-name="P6">cozinha profissional</text:p>
        </text:list-item>
        <text:list-item>
          <text:p text:style-name="P6">assados</text:p>
        </text:list-item>
        <text:list-item>
          <text:p text:style-name="P6">alimentos frescos</text:p>
        </text:list-item>
      </text:list>
      <text:p text:style-name="Horizontal_20_Line"/>
      <text:h text:style-name="Heading_20_1" text:outline-level="1">3. 🔤 Logotipo (texto)</text:h>
      <text:p text:style-name="Text_20_body">Escrita:</text:p>
      <text:p text:style-name="Text_20_body">CHARME FOOD</text:p>
      <text:p text:style-name="Text_20_body">Sugestão:</text:p>
      <text:p text:style-name="Text_20_body">CHARME em destaque<text:line-break/>FOOD menor</text:p>
      <text:p text:style-name="Text_20_body">Exemplo visual:</text:p>
      <text:p text:style-name="Text_20_body">CHARME<text:line-break/>FOOD</text:p>
      <text:p text:style-name="Text_20_body">ou</text:p>
      <text:p text:style-name="Text_20_body">CHARME Food</text:p>
      <text:p text:style-name="Horizontal_20_Line"/>
      <text:h text:style-name="Heading_20_1" text:outline-level="1">4. 🎨 Paleta de cores (ESSENCIAL)</text:h>
      <text:p text:style-name="Text_20_body">Sugestão profissional:</text:p>
      <text:h text:style-name="Heading_20_2" text:outline-level="2"><text:soft-page-break/>Cor principal</text:h>
      <text:p text:style-name="Text_20_body">Dourado queimado</text:p>
      <text:p text:style-name="Text_20_body">HEX:<text:line-break/>#C89B3C</text:p>
      <text:p text:style-name="Text_20_body">Representa:</text:p>
      <text:list text:style-name="L6">
        <text:list-item>
          <text:p text:style-name="P7">valor</text:p>
        </text:list-item>
        <text:list-item>
          <text:p text:style-name="P7">qualidade</text:p>
        </text:list-item>
        <text:list-item>
          <text:p text:style-name="P7">charme</text:p>
        </text:list-item>
      </text:list>
      <text:p text:style-name="Horizontal_20_Line"/>
      <text:h text:style-name="Heading_20_2" text:outline-level="2">Cor secundária</text:h>
      <text:p text:style-name="Text_20_body">Preto</text:p>
      <text:p text:style-name="Text_20_body">HEX:<text:line-break/>#1A1A1A</text:p>
      <text:p text:style-name="Text_20_body">Passa:</text:p>
      <text:list text:style-name="L7">
        <text:list-item>
          <text:p text:style-name="P8">força</text:p>
        </text:list-item>
        <text:list-item>
          <text:p text:style-name="P8">sofisticação</text:p>
        </text:list-item>
      </text:list>
      <text:p text:style-name="Horizontal_20_Line"/>
      <text:h text:style-name="Heading_20_2" text:outline-level="2">Cor opcional</text:h>
      <text:p text:style-name="Text_20_body">Verde folha</text:p>
      <text:p text:style-name="Text_20_body">HEX:<text:line-break/>#2E7D32</text:p>
      <text:p text:style-name="Text_20_body">Representa:</text:p>
      <text:list text:style-name="L8">
        <text:list-item>
          <text:p text:style-name="P9">alimentos frescos</text:p>
        </text:list-item>
      </text:list>
      <text:p text:style-name="Horizontal_20_Line"/>
      <text:h text:style-name="Heading_20_1" text:outline-level="1">5. 🧾 Tipografia</text:h>
      <text:p text:style-name="Text_20_body">Sugestões de fontes:</text:p>
      <text:p text:style-name="Text_20_body">Estilo elegante moderno:</text:p>
      <text:list text:style-name="L9">
        <text:list-item>
          <text:p text:style-name="P10">Cinzel</text:p>
        </text:list-item>
        <text:list-item>
          <text:p text:style-name="P10">Trajan Pro</text:p>
        </text:list-item>
        <text:list-item>
          <text:p text:style-name="P10">Playfair Display</text:p>
        </text:list-item>
        <text:list-item>
          <text:p text:style-name="P10">ou Montserrat (mais moderno)</text:p>
        </text:list-item>
      </text:list>
      <text:p text:style-name="Horizontal_20_Line"><text:soft-page-break/></text:p>
      <text:h text:style-name="Heading_20_1" text:outline-level="1">6. 🧱 Estrutura da logo</text:h>
      <text:p text:style-name="Text_20_body">Modelo completo:</text:p>
      <text:p text:style-name="Text_20_body">[ Ícone ] CHARME FOOD</text:p>
      <text:p text:style-name="Text_20_body">e também versão:</text:p>
      <text:p text:style-name="Text_20_body">Ícone em cima<text:line-break/>CHARME FOOD abaixo</text:p>
      <text:p text:style-name="Horizontal_20_Line"/>
      <text:h text:style-name="Heading_20_1" text:outline-level="1">7. 🧩 Como usar</text:h>
      <text:p text:style-name="Text_20_body">Você poderá usar em:</text:p>
      <text:list text:style-name="L10">
        <text:list-item>
          <text:p text:style-name="P11">embalagens</text:p>
        </text:list-item>
        <text:list-item>
          <text:p text:style-name="P11">fachada</text:p>
        </text:list-item>
        <text:list-item>
          <text:p text:style-name="P11">uniforme</text:p>
        </text:list-item>
        <text:list-item>
          <text:p text:style-name="P11">redes sociais</text:p>
        </text:list-item>
        <text:list-item>
          <text:p text:style-name="P11">adesivos</text:p>
        </text:list-item>
        <text:list-item>
          <text:p text:style-name="P11">caixas</text:p>
        </text:list-item>
        <text:list-item>
          <text:p text:style-name="P11">sacolas</text:p>
        </text:list-item>
      </text:list>
      <text:p text:style-name="Horizontal_20_Line"/>
      <text:h text:style-name="Heading_20_1" text:outline-level="1">8. 🧠 Estratégia inteligente (muito importante)</text:h>
      <text:p text:style-name="Text_20_body">Depois você pode usar:</text:p>
      <text:p text:style-name="Text_20_body">CharmSalads<text:line-break/>by Charme Food</text:p>
      <text:p text:style-name="Text_20_body">CharmeDubas<text:line-break/>by Charme Food</text:p>
      <text:p text:style-name="Text_20_body">Galetos Beach<text:line-break/>by Charme Food</text:p>
      <text:p text:style-name="Text_20_body">Charmousse<text:line-break/>by Charme Food</text:p>
      <text:p text:style-name="Text_20_body">Isso cria um grupo forte.</text:p>
      <text:p text:style-name="Horizontal_20_Line"/>
      <text:h text:style-name="Heading_20_1" text:outline-level="1"><text:soft-page-break/>9. 🖼️ Visual que recomendo</text:h>
      <text:p text:style-name="Text_20_body">Resumo direto para designer:</text:p>
      <text:p text:style-name="Text_20_body">Logo moderna minimalista</text:p>
      <text:p text:style-name="Text_20_body">Símbolo:</text:p>
      <text:p text:style-name="Text_20_body">Letra C estilizada com:</text:p>
      <text:list text:style-name="L11">
        <text:list-item>
          <text:p text:style-name="P12">folha</text:p>
        </text:list-item>
        <text:list-item>
          <text:p text:style-name="P12">chama</text:p>
        </text:list-item>
      </text:list>
      <text:p text:style-name="Text_20_body">Cor:</text:p>
      <text:p text:style-name="Text_20_body">Dourado + Preto</text:p>
      <text:p text:style-name="Text_20_body">Fonte elegante</text:p>
      <text:p text:style-name="Horizontal_20_Line"/>
      <text:h text:style-name="Heading_20_1" text:outline-level="1">10. Posso criar uma imagem pronta</text:h>
      <text:p text:style-name="Text_20_body">Se quiser, eu posso gerar:</text:p>
      <text:list text:style-name="L12">
        <text:list-item>
          <text:p text:style-name="P13">logomarca profissional pronta</text:p>
        </text:list-item>
        <text:list-item>
          <text:p text:style-name="P13">estilo premium</text:p>
        </text:list-item>
        <text:list-item>
          <text:p text:style-name="P13">pronta para Instagram e fachada</text:p>
        </text:list-item>
      </text:list>
      <text:p text:style-name="Text_20_body">Me diga:</text:p>
      <text:p text:style-name="Text_20_body">Visual mais:</text:p>
      <text:p text:style-name="Text_20_body">1 sofisticado premium<text:line-break/>2 moderno minimalista<text:line-break/>3 rústico gourmet<text:line-break/>4 forte agressivo (estilo fast food forte)</text:p>
      <text:p text:style-name="Text_20_body">Qual você prefere?</text:p>
      <text:p text:style-name="P14">4</text:p>
      <text:p text:style-name="P14">Imagem criada • Logo estilizado Charme Food</text:p>
      <text:section text:style-name="Sect1" text:name="image-43e8611b-8441-43b4-9f70-bc32a1483e76">
        <text:p text:style-name="P15"><draw:frame draw:style-name="fr1" draw:name="Figura1" text:anchor-type="as-char" svg:width="2cm" svg:height="1cm" draw:z-index="0"><draw:image xlink:href="https://chatgpt.com/backend-api/estuary/content?id=file_00000000de2871f5a029a910dfd88079&amp;ts=492070&amp;p=fs&amp;cid=1&amp;sig=ff77a3066deae70fdcc2c1b3a4960fe250e55c792673d940556cbd6663353200&amp;v=0" xlink:type="simple" xlink:show="embed" xlink:actuate="onLoad"/><svg:title>Imagem gerada</svg:title></draw:frame></text:p>
        <text:p text:style-name="P14"><draw:frame draw:style-name="fr1" draw:name="Figura2" text:anchor-type="as-char" svg:width="2cm" svg:height="1cm" draw:z-index="1"><draw:image xlink:href="https://chatgpt.com/backend-api/estuary/content?id=file_000000002360720eafd1ce6e0d0918ac&amp;ts=492070&amp;p=fs&amp;cid=1&amp;sig=7e706599999588306ce86ec9a873484df342cc865c4beba3f087e38e30b04587&amp;v=0" xlink:type="simple" xlink:show="embed" xlink:actuate="onLoad"/><svg:title>Imagem gerada</svg:title></draw:frame><draw:frame draw:style-name="fr1" draw:name="Figura3" text:anchor-type="as-char" svg:width="2cm" svg:height="1cm" draw:z-index="2"><draw:image xlink:href="https://chatgpt.com/backend-api/estuary/content?id=file_00000000de2871f5a029a910dfd88079&amp;ts=492070&amp;p=fs&amp;cid=1&amp;sig=ff77a3066deae70fdcc2c1b3a4960fe250e55c792673d940556cbd6663353200&amp;v=0" xlink:type="simple" xlink:show="embed" xlink:actuate="onLoad"/><svg:title>Imagem gerada</svg:title></draw:frame></text:p>
        <text:p text:style-name="P14"><draw:frame draw:style-name="fr1" draw:name="Figura4" text:anchor-type="as-char" svg:width="2cm" svg:height="1cm" draw:z-index="3"><draw:image xlink:href="https://chatgpt.com/backend-api/estuary/content?id=file_000000002360720eafd1ce6e0d0918ac&amp;ts=492070&amp;p=fs&amp;cid=1&amp;sig=7e706599999588306ce86ec9a873484df342cc865c4beba3f087e38e30b04587&amp;v=0" xlink:type="simple" xlink:show="embed" xlink:actuate="onLoad"/><svg:title>Imagem gerada</svg:title></draw:frame><draw:frame draw:style-name="fr1" draw:name="Figura5" text:anchor-type="as-char" svg:width="2cm" svg:height="1cm" draw:z-index="4"><draw:image xlink:href="https://chatgpt.com/backend-api/estuary/content?id=file_00000000de2871f5a029a910dfd88079&amp;ts=492070&amp;p=fs&amp;cid=1&amp;sig=ff77a3066deae70fdcc2c1b3a4960fe250e55c792673d940556cbd6663353200&amp;v=0" xlink:type="simple" xlink:show="embed" xlink:actuate="onLoad"/><svg:title>Imagem gerada</svg:title></draw:frame></text:p>
        <text:p text:style-name="P14">Compartilhar</text:p>
      </text:section>
      <text:p text:style-name="P14">Não gostei do E. Que tal "CHARM FOOD"?</text:p>
      <text:p text:style-name="P14">Imagem criada • Logo dinâmico e moderno Charm Food</text:p>
      <text:section text:style-name="Sect1" text:name="image-e75cb4df-27f8-43ba-bca9-ab6c703c2c50">
        <text:p text:style-name="P15"><text:soft-page-break/><draw:frame draw:style-name="fr1" draw:name="Figura6" text:anchor-type="as-char" svg:width="2cm" svg:height="1cm" draw:z-index="5"><draw:image xlink:href="https://chatgpt.com/backend-api/estuary/content?id=file_00000000827871f58346db6a6f5e20de&amp;ts=492070&amp;p=fs&amp;cid=1&amp;sig=7efee2af0fa4be8a23a48d0d114963616d2bfd8df42f9458e16eebfb1f30e21e&amp;v=0" xlink:type="simple" xlink:show="embed" xlink:actuate="onLoad"/><svg:title>Imagem gerada</svg:title></draw:frame></text:p>
        <text:p text:style-name="P14"><draw:frame draw:style-name="fr1" draw:name="Figura7" text:anchor-type="as-char" svg:width="2cm" svg:height="1cm" draw:z-index="6"><draw:image xlink:href="https://chatgpt.com/backend-api/estuary/content?id=file_00000000d3d8720ead0d507adc3d4536&amp;ts=492070&amp;p=fs&amp;cid=1&amp;sig=242fb2c6085b5c871f44ea292727fa3cde0b794ceb268360702ccf584f88bab2&amp;v=0" xlink:type="simple" xlink:show="embed" xlink:actuate="onLoad"/><svg:title>Imagem gerada</svg:title></draw:frame><draw:frame draw:style-name="fr1" draw:name="Figura8" text:anchor-type="as-char" svg:width="2cm" svg:height="1cm" draw:z-index="7"><draw:image xlink:href="https://chatgpt.com/backend-api/estuary/content?id=file_00000000827871f58346db6a6f5e20de&amp;ts=492070&amp;p=fs&amp;cid=1&amp;sig=7efee2af0fa4be8a23a48d0d114963616d2bfd8df42f9458e16eebfb1f30e21e&amp;v=0" xlink:type="simple" xlink:show="embed" xlink:actuate="onLoad"/><svg:title>Imagem gerada</svg:title></draw:frame></text:p>
        <text:p text:style-name="P14">Compartilhar</text:p>
      </text:section>
      <text:p text:style-name="P14">Vamos tentar com visual 1- sofisticado premium</text:p>
      <text:p text:style-name="P14">Imagem criada • Logo estilizado Charm Food em dourado</text:p>
      <text:section text:style-name="Sect1" text:name="image-af5854b4-306f-4dcc-8b6d-5ec30547a95b">
        <text:p text:style-name="P15"><draw:frame draw:style-name="fr1" draw:name="Figura9" text:anchor-type="as-char" svg:width="2cm" svg:height="1cm" draw:z-index="8"><draw:image xlink:href="https://chatgpt.com/backend-api/estuary/content?id=file_00000000389471f5b79bbb978f5eddb5&amp;ts=492070&amp;p=fs&amp;cid=1&amp;sig=acf2b9795ad14c0789b87e84677ba35a3a29ce30c782e880f63e92ba6adfecf2&amp;v=0" xlink:type="simple" xlink:show="embed" xlink:actuate="onLoad"/><svg:title>Imagem gerada</svg:title></draw:frame></text:p>
        <text:p text:style-name="P14"><draw:frame draw:style-name="fr1" draw:name="Figura10" text:anchor-type="as-char" svg:width="2cm" svg:height="1cm" draw:z-index="9"><draw:image xlink:href="https://chatgpt.com/backend-api/estuary/content?id=file_000000009a6c71f58bf5518f2600e201&amp;ts=492070&amp;p=fs&amp;cid=1&amp;sig=ae79395a33ce7e448df50c367859d3ac7392ba379aa0783e266a698458214236&amp;v=0" xlink:type="simple" xlink:show="embed" xlink:actuate="onLoad"/><svg:title>Imagem gerada</svg:title></draw:frame><draw:frame draw:style-name="fr1" draw:name="Figura11" text:anchor-type="as-char" svg:width="2cm" svg:height="1cm" draw:z-index="10"><draw:image xlink:href="https://chatgpt.com/backend-api/estuary/content?id=file_00000000389471f5b79bbb978f5eddb5&amp;ts=492070&amp;p=fs&amp;cid=1&amp;sig=acf2b9795ad14c0789b87e84677ba35a3a29ce30c782e880f63e92ba6adfecf2&amp;v=0" xlink:type="simple" xlink:show="embed" xlink:actuate="onLoad"/><svg:title>Imagem gerada</svg:title></draw:frame></text:p>
        <text:p text:style-name="P14"><draw:frame draw:style-name="fr1" draw:name="Figura12" text:anchor-type="as-char" svg:width="2cm" svg:height="1cm" draw:z-index="11"><draw:image xlink:href="https://chatgpt.com/backend-api/estuary/content?id=file_000000009a6c71f58bf5518f2600e201&amp;ts=492070&amp;p=fs&amp;cid=1&amp;sig=ae79395a33ce7e448df50c367859d3ac7392ba379aa0783e266a698458214236&amp;v=0" xlink:type="simple" xlink:show="embed" xlink:actuate="onLoad"/><svg:title>Imagem gerada</svg:title></draw:frame><draw:frame draw:style-name="fr1" draw:name="Figura13" text:anchor-type="as-char" svg:width="2cm" svg:height="1cm" draw:z-index="12"><draw:image xlink:href="https://chatgpt.com/backend-api/estuary/content?id=file_00000000389471f5b79bbb978f5eddb5&amp;ts=492070&amp;p=fs&amp;cid=1&amp;sig=acf2b9795ad14c0789b87e84677ba35a3a29ce30c782e880f63e92ba6adfecf2&amp;v=0" xlink:type="simple" xlink:show="embed" xlink:actuate="onLoad"/><svg:title>Imagem gerada</svg:title></draw:frame></text:p>
        <text:p text:style-name="P14">Compartilhar</text:p>
      </text:section>
      <text:p text:style-name="P14">Gostei, mas vamos tentar com visual 2 moderno minimalista</text:p>
      <text:p text:style-name="P14">Imagem criada • Logotipo moderno "Charm Food"</text:p>
      <text:section text:style-name="Sect1" text:name="image-4996c224-be1f-4528-837b-c2a090b8f35b">
        <text:p text:style-name="P15"><draw:frame draw:style-name="fr1" draw:name="Figura14" text:anchor-type="as-char" svg:width="2cm" svg:height="1cm" draw:z-index="13"><draw:image xlink:href="https://chatgpt.com/backend-api/estuary/content?id=file_00000000081471f5987413f82b219199&amp;ts=492070&amp;p=fs&amp;cid=1&amp;sig=11d9db8198118a2eeadf11ddd1a06924acd63f7e83b4cb22f77208e19a9217f3&amp;v=0" xlink:type="simple" xlink:show="embed" xlink:actuate="onLoad"/><svg:title>Imagem gerada</svg:title></draw:frame></text:p>
        <text:p text:style-name="P14"><draw:frame draw:style-name="fr1" draw:name="Figura15" text:anchor-type="as-char" svg:width="2cm" svg:height="1cm" draw:z-index="14"><draw:image xlink:href="https://chatgpt.com/backend-api/estuary/content?id=file_000000001b6071f5b7294de7160a880b&amp;ts=492070&amp;p=fs&amp;cid=1&amp;sig=4be0abefccd15c865b23542461d14074634d1213354e57dadc73f73ed1f6203c&amp;v=0" xlink:type="simple" xlink:show="embed" xlink:actuate="onLoad"/><svg:title>Imagem gerada</svg:title></draw:frame><draw:frame draw:style-name="fr1" draw:name="Figura16" text:anchor-type="as-char" svg:width="2cm" svg:height="1cm" draw:z-index="15"><draw:image xlink:href="https://chatgpt.com/backend-api/estuary/content?id=file_00000000081471f5987413f82b219199&amp;ts=492070&amp;p=fs&amp;cid=1&amp;sig=11d9db8198118a2eeadf11ddd1a06924acd63f7e83b4cb22f77208e19a9217f3&amp;v=0" xlink:type="simple" xlink:show="embed" xlink:actuate="onLoad"/><svg:title>Imagem gerada</svg:title></draw:frame></text:p>
        <text:p text:style-name="P14"><draw:frame draw:style-name="fr1" draw:name="Figura17" text:anchor-type="as-char" svg:width="2cm" svg:height="1cm" draw:z-index="16"><draw:image xlink:href="https://chatgpt.com/backend-api/estuary/content?id=file_000000001b6071f5b7294de7160a880b&amp;ts=492070&amp;p=fs&amp;cid=1&amp;sig=4be0abefccd15c865b23542461d14074634d1213354e57dadc73f73ed1f6203c&amp;v=0" xlink:type="simple" xlink:show="embed" xlink:actuate="onLoad"/><svg:title>Imagem gerada</svg:title></draw:frame><draw:frame draw:style-name="fr1" draw:name="Figura18" text:anchor-type="as-char" svg:width="2cm" svg:height="1cm" draw:z-index="17"><draw:image xlink:href="https://chatgpt.com/backend-api/estuary/content?id=file_00000000081471f5987413f82b219199&amp;ts=492070&amp;p=fs&amp;cid=1&amp;sig=11d9db8198118a2eeadf11ddd1a06924acd63f7e83b4cb22f77208e19a9217f3&amp;v=0" xlink:type="simple" xlink:show="embed" xlink:actuate="onLoad"/><svg:title>Imagem gerada</svg:title></draw:frame></text:p>
        <text:p text:style-name="P14">Compartilhar</text:p>
      </text:section>
      <text:p text:style-name="P14">ok, mas vamos tentar com visual 3 rústico gourmet</text:p>
      <text:p text:style-name="P14">Imagem criada • Logo charme e rusticidade</text:p>
      <text:section text:style-name="Sect1" text:name="image-720a772a-f15d-465a-84ae-33205485e06b">
        <text:p text:style-name="P15"><draw:frame draw:style-name="fr1" draw:name="Figura19" text:anchor-type="as-char" svg:width="2cm" svg:height="1cm" draw:z-index="18"><draw:image xlink:href="https://chatgpt.com/backend-api/estuary/content?id=file_000000003ac4720ebf44807bd8f3c30a&amp;ts=492070&amp;p=fs&amp;cid=1&amp;sig=c0573bff35a301b190fe3a5080584fc4c752bb4b61498a0ed10b1e1e82980745&amp;v=0" xlink:type="simple" xlink:show="embed" xlink:actuate="onLoad"/><svg:title>Imagem gerada</svg:title></draw:frame></text:p>
        <text:p text:style-name="P14"><draw:frame draw:style-name="fr1" draw:name="Figura20" text:anchor-type="as-char" svg:width="2cm" svg:height="1cm" draw:z-index="19"><draw:image xlink:href="https://chatgpt.com/backend-api/estuary/content?id=file_00000000fe5471f5b870df9639f109ba&amp;ts=492070&amp;p=fs&amp;cid=1&amp;sig=3586e6f06f2a0e849439c72256724423cb8b112d701b593e4b07b5db3d308159&amp;v=0" xlink:type="simple" xlink:show="embed" xlink:actuate="onLoad"/><svg:title>Imagem gerada</svg:title></draw:frame><draw:frame draw:style-name="fr1" draw:name="Figura21" text:anchor-type="as-char" svg:width="2cm" svg:height="1cm" draw:z-index="20"><draw:image xlink:href="https://chatgpt.com/backend-api/estuary/content?id=file_000000003ac4720ebf44807bd8f3c30a&amp;ts=492070&amp;p=fs&amp;cid=1&amp;sig=c0573bff35a301b190fe3a5080584fc4c752bb4b61498a0ed10b1e1e82980745&amp;v=0" xlink:type="simple" xlink:show="embed" xlink:actuate="onLoad"/><svg:title>Imagem gerada</svg:title></draw:frame></text:p>
        <text:p text:style-name="P14"><draw:frame draw:style-name="fr1" draw:name="Figura22" text:anchor-type="as-char" svg:width="2cm" svg:height="1cm" draw:z-index="21"><draw:image xlink:href="https://chatgpt.com/backend-api/estuary/content?id=file_00000000fe5471f5b870df9639f109ba&amp;ts=492070&amp;p=fs&amp;cid=1&amp;sig=3586e6f06f2a0e849439c72256724423cb8b112d701b593e4b07b5db3d308159&amp;v=0" xlink:type="simple" xlink:show="embed" xlink:actuate="onLoad"/><svg:title>Imagem gerada</svg:title></draw:frame><draw:frame draw:style-name="fr1" draw:name="Figura23" text:anchor-type="as-char" svg:width="2cm" svg:height="1cm" draw:z-index="22"><draw:image xlink:href="https://chatgpt.com/backend-api/estuary/content?id=file_000000003ac4720ebf44807bd8f3c30a&amp;ts=492070&amp;p=fs&amp;cid=1&amp;sig=c0573bff35a301b190fe3a5080584fc4c752bb4b61498a0ed10b1e1e82980745&amp;v=0" xlink:type="simple" xlink:show="embed" xlink:actuate="onLoad"/><svg:title>Imagem gerada</svg:title></draw:frame></text:p>
        <text:p text:style-name="P14">Compartilhar</text:p>
      </text:section>
      <text:p text:style-name="Text_20_body">É isso. Agora precisamos de uma frase de efeito;</text:p>
      <text:p text:style-name="Text_20_body">Perfeito. Como <text:span text:style-name="Strong_20_Emphasis">CHARM FOOD</text:span> é um <text:span text:style-name="Strong_20_Emphasis">grupo forte, estilo rústico gourmet</text:span>, a frase precisa transmitir:</text:p>
      <text:list text:style-name="L13">
        <text:list-item>
          <text:p text:style-name="P16">sabor</text:p>
        </text:list-item>
        <text:list-item>
          <text:p text:style-name="P16">autoridade</text:p>
        </text:list-item>
        <text:list-item>
          <text:p text:style-name="P16">desejo</text:p>
        </text:list-item>
        <text:list-item>
          <text:p text:style-name="P16">marca forte</text:p>
        </text:list-item>
        <text:list-item>
          <text:p text:style-name="P16">versatilidade (saladas, frango, sanduíche, sobremesas)</text:p>
        </text:list-item>
      </text:list>
      <text:p text:style-name="Text_20_body">Aqui vão as <text:span text:style-name="Strong_20_Emphasis">melhores frases de efeito, nível profissional</text:span>:</text:p>
      <text:p text:style-name="Horizontal_20_Line"/>
      <text:h text:style-name="Heading_20_1" text:outline-level="1"><text:soft-page-break/>🔥 TOP 10 – Frases de efeito para CHARM FOOD</text:h>
      <text:h text:style-name="Heading_20_2" text:outline-level="2">1️⃣ (Minha principal recomendação)</text:h>
      <text:p text:style-name="Text_20_body"><text:span text:style-name="Strong_20_Emphasis">"O sabor que domina."</text:span></text:p>
      <text:p text:style-name="Text_20_body">Curta, forte, dominante.</text:p>
      <text:p text:style-name="Horizontal_20_Line"/>
      <text:h text:style-name="Heading_20_2" text:outline-level="2">2️⃣ Muito forte também</text:h>
      <text:p text:style-name="Text_20_body"><text:span text:style-name="Strong_20_Emphasis">"Charme no nome. Poder no sabor."</text:span></text:p>
      <text:p text:style-name="Text_20_body">Excelente para marca dominante.</text:p>
      <text:p text:style-name="Horizontal_20_Line"/>
      <text:h text:style-name="Heading_20_2" text:outline-level="2">3️⃣ Estilo premium</text:h>
      <text:p text:style-name="Text_20_body"><text:span text:style-name="Strong_20_Emphasis">"Onde o sabor vira experiência."</text:span></text:p>
      <text:p text:style-name="Text_20_body">Mais sofisticada.</text:p>
      <text:p text:style-name="Horizontal_20_Line"/>
      <text:h text:style-name="Heading_20_2" text:outline-level="2">4️⃣ Estilo forte e direto</text:h>
      <text:p text:style-name="Text_20_body"><text:span text:style-name="Strong_20_Emphasis">"Feito para impressionar."</text:span></text:p>
      <text:p text:style-name="Text_20_body">Muito boa para frango assado.</text:p>
      <text:p text:style-name="Horizontal_20_Line"/>
      <text:h text:style-name="Heading_20_2" text:outline-level="2">5️⃣ Estilo grupo empresarial</text:h>
      <text:p text:style-name="Text_20_body"><text:span text:style-name="Strong_20_Emphasis">"Um grupo. Todos os sabores."</text:span></text:p>
      <text:p text:style-name="Text_20_body">Perfeita para quem tem vários negócios.</text:p>
      <text:p text:style-name="Horizontal_20_Line"/>
      <text:h text:style-name="Heading_20_2" text:outline-level="2">6️⃣ Estilo rústico gourmet</text:h>
      <text:p text:style-name="Text_20_body"><text:span text:style-name="Strong_20_Emphasis">"Sabor de verdade."</text:span></text:p>
      <text:p text:style-name="Text_20_body">Simples e poderoso.</text:p>
      <text:p text:style-name="Horizontal_20_Line"/>
      <text:h text:style-name="Heading_20_2" text:outline-level="2"><text:soft-page-break/>7️⃣ Estilo viciante</text:h>
      <text:p text:style-name="Text_20_body"><text:span text:style-name="Strong_20_Emphasis">"Impossível comer uma vez só."</text:span></text:p>
      <text:p text:style-name="Text_20_body">Ótimo para vendas.</text:p>
      <text:p text:style-name="Horizontal_20_Line"/>
      <text:h text:style-name="Heading_20_2" text:outline-level="2">8️⃣ Estilo autoridade</text:h>
      <text:p text:style-name="Text_20_body"><text:span text:style-name="Strong_20_Emphasis">"Referência em sabor."</text:span></text:p>
      <text:p text:style-name="Text_20_body">Passa liderança.</text:p>
      <text:p text:style-name="Horizontal_20_Line"/>
      <text:h text:style-name="Heading_20_2" text:outline-level="2">9️⃣ Estilo emocional</text:h>
      <text:p text:style-name="Text_20_body"><text:span text:style-name="Strong_20_Emphasis">"O charme de comer bem."</text:span></text:p>
      <text:p text:style-name="Text_20_body">Combina com o nome.</text:p>
      <text:p text:style-name="Horizontal_20_Line"/>
      <text:h text:style-name="Heading_20_2" text:outline-level="2">🔟 Estilo forte churrasco / frango</text:h>
      <text:p text:style-name="Text_20_body"><text:span text:style-name="Strong_20_Emphasis">"Fogo, sabor e respeito."</text:span></text:p>
      <text:p text:style-name="Text_20_body">Muito forte.</text:p>
      <text:p text:style-name="Horizontal_20_Line"/>
      <text:h text:style-name="Heading_20_1" text:outline-level="1">⭐ Minha recomendação final para sua marca:</text:h>
      <text:h text:style-name="Heading_20_2" text:outline-level="2">✅ Melhor opção:</text:h>
      <text:h text:style-name="Heading_20_1" text:outline-level="1">CHARM FOOD</text:h>
      <text:h text:style-name="Heading_20_2" text:outline-level="2">"O sabor que domina."</text:h>
      <text:p text:style-name="Horizontal_20_Line"/>
      <text:h text:style-name="Heading_20_1" text:outline-level="1">💎 Como ficará na logo:</text:h>
      <text:p text:style-name="Text_20_body">CHARM FOOD<text:line-break/>O sabor que domina.</text:p>
      <text:p text:style-name="Horizontal_20_Line"/>
      <text:h text:style-name="Heading_20_1" text:outline-level="1"><text:soft-page-break/>Se quiser, posso criar também:</text:h>
      <text:p text:style-name="Text_20_body">✔ slogan para cada marca separada:</text:p>
      <text:p text:style-name="Text_20_body">CharmSalads<text:line-break/>CharmeDubas<text:line-break/>Galetos Beach<text:line-break/>Charmousse</text:p>
      <text:p text:style-name="Text_20_body">Tudo dentro do mesmo grupo.</text:p>
      <text:p text:style-name="Text_20_body">Isso transforma seu negócio em uma rede profissional.</text:p>
      <text:p text:style-name="Text_20_body">Sim. Por favor.</text:p>
      <text:p text:style-name="Text_20_body">Perfeito. Vamos transformar suas marcas em um <text:span text:style-name="Strong_20_Emphasis">GRUPO PROFISSIONAL</text:span>, todas conectadas ao <text:span text:style-name="Strong_20_Emphasis">CHARM FOOD</text:span>.</text:p>
      <text:p text:style-name="Text_20_body">Vou criar <text:span text:style-name="Strong_20_Emphasis">slogans individuais fortes</text:span>, mas que combinam entre si.</text:p>
      <text:p text:style-name="Horizontal_20_Line"/>
      <text:h text:style-name="Heading_20_1" text:outline-level="1">🥗 CHARM SALADS</text:h>
      <text:p text:style-name="Text_20_body">(Saladas tropicais – leveza, saúde, desejo)</text:p>
      <text:h text:style-name="Heading_20_2" text:outline-level="2">Melhor slogan:</text:h>
      <text:p text:style-name="Text_20_body"><text:span text:style-name="Strong_20_Emphasis">"Leve no peso. Pesada no sabor."</text:span></text:p>
      <text:p text:style-name="Text_20_body">Outras opções:</text:p>
      <text:list text:style-name="L14">
        <text:list-item>
          <text:p text:style-name="P17">"O tropical que conquista."</text:p>
        </text:list-item>
        <text:list-item>
          <text:p text:style-name="P17">"Natural de verdade."</text:p>
        </text:list-item>
        <text:list-item>
          <text:p text:style-name="P17">"Sabor que refresca."</text:p>
        </text:list-item>
        <text:list-item>
          <text:p text:style-name="P17">"Sua escolha inteligente."</text:p>
        </text:list-item>
      </text:list>
      <text:p text:style-name="Horizontal_20_Line"/>
      <text:h text:style-name="Heading_20_1" text:outline-level="1">🥪 CHARME DUBAS</text:h>
      <text:p text:style-name="Text_20_body">(Sanduíches naturais – rápido, gostoso, viciante)</text:p>
      <text:h text:style-name="Heading_20_2" text:outline-level="2">Melhor slogan:</text:h>
      <text:p text:style-name="Text_20_body"><text:span text:style-name="Strong_20_Emphasis">"Naturalmente viciante."</text:span></text:p>
      <text:p text:style-name="Text_20_body">Outras opções:</text:p>
      <text:list text:style-name="L15">
        <text:list-item>
          <text:p text:style-name="P18">"O sanduíche que surpreende."</text:p>
        </text:list-item>
        <text:list-item>
          <text:p text:style-name="P18"><text:soft-page-break/>"Grande no sabor."</text:p>
        </text:list-item>
        <text:list-item>
          <text:p text:style-name="P18">"Seu novo vício."</text:p>
        </text:list-item>
        <text:list-item>
          <text:p text:style-name="P18">"Simples. Forte. Delicioso."</text:p>
        </text:list-item>
      </text:list>
      <text:p text:style-name="Horizontal_20_Line"/>
      <text:h text:style-name="Heading_20_1" text:outline-level="1">🍗 GALETOS BEACH</text:h>
      <text:p text:style-name="Text_20_body">(Frango assado – fogo, gordura, desejo, impacto)</text:p>
      <text:h text:style-name="Heading_20_2" text:outline-level="2">Melhor slogan:</text:h>
      <text:p text:style-name="Text_20_body"><text:span text:style-name="Strong_20_Emphasis">"O frango que manda."</text:span></text:p>
      <text:p text:style-name="Text_20_body">Outras opções:</text:p>
      <text:list text:style-name="L16">
        <text:list-item>
          <text:p text:style-name="P19">"Aqui o fogo tem respeito."</text:p>
        </text:list-item>
        <text:list-item>
          <text:p text:style-name="P19">"Assado de verdade."</text:p>
        </text:list-item>
        <text:list-item>
          <text:p text:style-name="P19">"Bruto no sabor."</text:p>
        </text:list-item>
        <text:list-item>
          <text:p text:style-name="P19">"Explosão de sabor."</text:p>
        </text:list-item>
      </text:list>
      <text:p text:style-name="Horizontal_20_Line"/>
      <text:h text:style-name="Heading_20_1" text:outline-level="1">🍰 CHARMOUSSE</text:h>
      <text:p text:style-name="Text_20_body">(Sobremesas congeladas – prazer, desejo, indulgência)</text:p>
      <text:h text:style-name="Heading_20_2" text:outline-level="2">Melhor slogan:</text:h>
      <text:p text:style-name="Text_20_body"><text:span text:style-name="Strong_20_Emphasis">"O prazer mora aqui."</text:span></text:p>
      <text:p text:style-name="Text_20_body">Outras opções:</text:p>
      <text:list text:style-name="L17">
        <text:list-item>
          <text:p text:style-name="P20">"Perfeita até a última colher."</text:p>
        </text:list-item>
        <text:list-item>
          <text:p text:style-name="P20">"Feita para se apaixonar."</text:p>
        </text:list-item>
        <text:list-item>
          <text:p text:style-name="P20">"Seu momento doce."</text:p>
        </text:list-item>
        <text:list-item>
          <text:p text:style-name="P20">"Impossível resistir."</text:p>
        </text:list-item>
      </text:list>
      <text:p text:style-name="Horizontal_20_Line"/>
      <text:h text:style-name="Heading_20_1" text:outline-level="1"><text:soft-page-break/>👑 GRUPO PRINCIPAL</text:h>
      <text:h text:style-name="Heading_20_1" text:outline-level="1">CHARM FOOD</text:h>
      <text:h text:style-name="Heading_20_2" text:outline-level="2">"O sabor que domina."</text:h>
      <text:p text:style-name="Horizontal_20_Line"/>
      <text:h text:style-name="Heading_20_1" text:outline-level="1">📦 Como ficará o posicionamento completo:</text:h>
      <text:p text:style-name="Text_20_body">CHARM FOOD<text:line-break/>O sabor que domina.</text:p>
      <text:p text:style-name="Text_20_body">CharmSalads<text:line-break/>Leve no peso. Pesada no sabor.</text:p>
      <text:p text:style-name="Text_20_body">CharmeDubas<text:line-break/>Naturalmente viciante.</text:p>
      <text:p text:style-name="Text_20_body">Galetos Beach<text:line-break/>O frango que manda.</text:p>
      <text:p text:style-name="Text_20_body">Charmousse<text:line-break/>O prazer mora aqui.</text:p>
      <text:p text:style-name="Horizontal_20_Line"/>
      <text:h text:style-name="Heading_20_1" text:outline-level="1">🧠 Estratégia profissional (muito importante)</text:h>
      <text:p text:style-name="Text_20_body">Sempre usar:</text:p>
      <text:p text:style-name="Text_20_body"><text:span text:style-name="Strong_20_Emphasis">Marca principal pequena abaixo:</text:span></text:p>
      <text:p text:style-name="Text_20_body">Exemplo:</text:p>
      <text:p text:style-name="Text_20_body">Galetos Beach<text:line-break/>by CHARM FOOD</text:p>
      <text:p text:style-name="Text_20_body">Isso constrói um império de marca.</text:p>
      <text:p text:style-name="Horizontal_20_Line"/>
      <text:h text:style-name="Heading_20_1" text:outline-level="1">🚀 Próximo nível (se quiser)</text:h>
      <text:p text:style-name="Text_20_body">Posso criar também:</text:p>
      <text:p text:style-name="Text_20_body">✔ padrão visual para todas<text:line-break/>✔ fachada<text:line-break/>✔ embalagem<text:line-break/>✔ Instagram<text:line-break/><text:soft-page-break/>✔ uniforme<text:line-break/>✔ etiquetas</text:p>
      <text:p text:style-name="Text_20_body">Tudo padronizado nível franquia.</text:p>
      <text:p text:style-name="Text_20_body">Só me diga:</text:p>
      <text:p text:style-name="Text_20_body">Seu público é mais:</text:p>
      <text:p text:style-name="Text_20_body">1 popular<text:line-break/>2 médio<text:line-break/>3 premium<text:line-break/>4 misto (todos)</text:p>
      <text:p text:style-name="Text_20_body">2</text:p>
      <text:p text:style-name="Text_20_body">Perfeito. Público <text:span text:style-name="Strong_20_Emphasis">nível 2 – médio</text:span> é o melhor posicionamento: <text:span text:style-name="Strong_20_Emphasis">vende muito, tem boa margem e constrói marca forte.</text:span></text:p>
      <text:p text:style-name="Text_20_body">Agora vamos ajustar tudo para ficar <text:span text:style-name="Strong_20_Emphasis">profissional, acessível e desejado</text:span> — padrão de rede.</text:p>
      <text:p text:style-name="Horizontal_20_Line"/>
      <text:h text:style-name="Heading_20_1" text:outline-level="1">👑 POSICIONAMENTO OFICIAL DO GRUPO</text:h>
      <text:h text:style-name="Heading_20_1" text:outline-level="1">CHARM FOOD</text:h>
      <text:p text:style-name="Text_20_body"><text:span text:style-name="Strong_20_Emphasis">"O sabor que domina."</text:span></text:p>
      <text:p text:style-name="Text_20_body"><text:span text:style-name="Strong_20_Emphasis">Conceito:</text:span> forte, confiável e acessível.</text:p>
      <text:p text:style-name="Text_20_body">Tom: profissional sem ser caro demais.</text:p>
      <text:p text:style-name="Horizontal_20_Line"/>
      <text:h text:style-name="Heading_20_1" text:outline-level="1">🥗 CHARM SALADS</text:h>
      <text:p text:style-name="Text_20_body"><text:span text:style-name="Strong_20_Emphasis">"Leve no peso. Forte no sabor."</text:span></text:p>
      <text:p text:style-name="Text_20_body">(Ajustei a palavra “pesada” para “forte” — mais positivo para público médio)</text:p>
      <text:p text:style-name="Text_20_body"><text:span text:style-name="Strong_20_Emphasis">Sensação:</text:span> saudável e gostoso, não “fitness chato”.</text:p>
      <text:p text:style-name="Horizontal_20_Line"/>
      <text:h text:style-name="Heading_20_1" text:outline-level="1">🥪 CHARME DUBAS</text:h>
      <text:p text:style-name="Text_20_body"><text:span text:style-name="Strong_20_Emphasis">"Naturalmente delicioso."</text:span></text:p>
      <text:p text:style-name="Text_20_body">Troquei de “viciante” para <text:span text:style-name="Strong_20_Emphasis">delicioso</text:span>, porque:</text:p>
      <text:list text:style-name="L18">
        <text:list-item>
          <text:p text:style-name="P21"><text:soft-page-break/>público médio responde melhor</text:p>
        </text:list-item>
        <text:list-item>
          <text:p text:style-name="P21">mais familiar</text:p>
        </text:list-item>
        <text:list-item>
          <text:p text:style-name="P21">mais confiável</text:p>
        </text:list-item>
      </text:list>
      <text:p text:style-name="Horizontal_20_Line"/>
      <text:h text:style-name="Heading_20_1" text:outline-level="1">🍗 GALETOS BEACH</text:h>
      <text:p text:style-name="Text_20_body"><text:span text:style-name="Strong_20_Emphasis">"Assado no ponto. Sabor no máximo."</text:span></text:p>
      <text:p text:style-name="Text_20_body">Perfeito para público médio:</text:p>
      <text:list text:style-name="L19">
        <text:list-item>
          <text:p text:style-name="P22">forte</text:p>
        </text:list-item>
        <text:list-item>
          <text:p text:style-name="P22">apetitoso</text:p>
        </text:list-item>
        <text:list-item>
          <text:p text:style-name="P22">profissional</text:p>
        </text:list-item>
      </text:list>
      <text:p text:style-name="Horizontal_20_Line"/>
      <text:h text:style-name="Heading_20_1" text:outline-level="1">🍰 CHARMOUSSE</text:h>
      <text:p text:style-name="Text_20_body"><text:span text:style-name="Strong_20_Emphasis">"Transformando sabor em prazer."</text:span></text:p>
      <text:p text:style-name="Text_20_body">Passa:</text:p>
      <text:list text:style-name="L20">
        <text:list-item>
          <text:p text:style-name="P23">qualidade</text:p>
        </text:list-item>
        <text:list-item>
          <text:p text:style-name="P23">desejo</text:p>
        </text:list-item>
        <text:list-item>
          <text:p text:style-name="P23">valor</text:p>
        </text:list-item>
      </text:list>
      <text:p text:style-name="Horizontal_20_Line"/>
      <text:h text:style-name="Heading_20_1" text:outline-level="1">🧠 COMO USAR NAS ARTES</text:h>
      <text:p text:style-name="Text_20_body">Exemplo:</text:p>
      <text:p text:style-name="Horizontal_20_Line"/>
      <text:h text:style-name="Heading_20_2" text:outline-level="2">GALETOS BEACH</text:h>
      <text:p text:style-name="Text_20_body">GALETOS BEACH<text:line-break/>Assado no ponto. Sabor no máximo.</text:p>
      <text:p text:style-name="Text_20_body">by CHARM FOOD</text:p>
      <text:p text:style-name="Horizontal_20_Line"/>
      <text:h text:style-name="Heading_20_1" text:outline-level="1"><text:soft-page-break/>🎨 PADRÃO DE CORES (RECOMENDADO)</text:h>
      <text:p text:style-name="Text_20_body">Cada marca com sua cor, mas mantendo o grupo:</text:p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Table_20_Heading">Marca</text:p>
            </table:table-cell>
            <table:table-cell table:style-name="Tabela1.A1" office:value-type="string">
              <text:p text:style-name="Table_20_Heading">Cor</text:p>
            </table:table-cell>
          </table:table-row>
        </table:table-header-rows>
        <table:table-row>
          <table:table-cell table:style-name="Tabela1.A1" office:value-type="string">
            <text:p text:style-name="Table_20_Contents">CHARM FOOD</text:p>
          </table:table-cell>
          <table:table-cell table:style-name="Tabela1.A1" office:value-type="string">
            <text:p text:style-name="Table_20_Contents">dourado + preto</text:p>
          </table:table-cell>
        </table:table-row>
        <table:table-row>
          <table:table-cell table:style-name="Tabela1.A1" office:value-type="string">
            <text:p text:style-name="Table_20_Contents">CharmSalads</text:p>
          </table:table-cell>
          <table:table-cell table:style-name="Tabela1.A1" office:value-type="string">
            <text:p text:style-name="Table_20_Contents">verde</text:p>
          </table:table-cell>
        </table:table-row>
        <table:table-row>
          <table:table-cell table:style-name="Tabela1.A1" office:value-type="string">
            <text:p text:style-name="Table_20_Contents">CharmeDubas</text:p>
          </table:table-cell>
          <table:table-cell table:style-name="Tabela1.A1" office:value-type="string">
            <text:p text:style-name="Table_20_Contents">amarelo</text:p>
          </table:table-cell>
        </table:table-row>
        <table:table-row>
          <table:table-cell table:style-name="Tabela1.A1" office:value-type="string">
            <text:p text:style-name="Table_20_Contents">Galetos Beach</text:p>
          </table:table-cell>
          <table:table-cell table:style-name="Tabela1.A1" office:value-type="string">
            <text:p text:style-name="Table_20_Contents">vermelho fogo</text:p>
          </table:table-cell>
        </table:table-row>
        <table:table-row>
          <table:table-cell table:style-name="Tabela1.A1" office:value-type="string">
            <text:p text:style-name="Table_20_Contents">Charmousse</text:p>
          </table:table-cell>
          <table:table-cell table:style-name="Tabela1.A1" office:value-type="string">
            <text:p text:style-name="Table_20_Contents">marrom chocolate</text:p>
          </table:table-cell>
        </table:table-row>
      </table:table>
      <text:p text:style-name="Horizontal_20_Line"/>
      <text:h text:style-name="Heading_20_1" text:outline-level="1">🏪 PADRÃO DE FACHADA (nível rede)</text:h>
      <text:p text:style-name="Text_20_body">Exemplo Galetos:</text:p>
      <text:p text:style-name="Text_20_body">Fundo preto<text:line-break/>Logo dourado<text:line-break/>Detalhes vermelhos</text:p>
      <text:p text:style-name="Text_20_body">Visual forte e moderno.</text:p>
      <text:p text:style-name="Horizontal_20_Line"/>
      <text:h text:style-name="Heading_20_1" text:outline-level="1">📱 BIO PROFISSIONAL INSTAGRAM</text:h>
      <text:p text:style-name="Text_20_body">Exemplo:</text:p>
      <text:h text:style-name="Heading_20_2" text:outline-level="2">Galetos Beach</text:h>
      <text:p text:style-name="Text_20_body">Galetos Beach 🔥<text:line-break/>Assado no ponto. Sabor no máximo.<text:line-break/>by CHARM FOOD<text:line-break/>📍 [sua cidade]<text:line-break/>📲 Peça agora</text:p>
      <text:p text:style-name="Horizontal_20_Line"/>
      <text:h text:style-name="Heading_20_1" text:outline-level="1">🚀 RESULTADO FINAL</text:h>
      <text:p text:style-name="Text_20_body">Você terá:</text:p>
      <text:p text:style-name="Text_20_body">Um grupo com aparência de franquia.</text:p>
      <text:p text:style-name="Text_20_body">Exemplo real de percepção:</text:p>
      <text:p text:style-name="Text_20_body">As pessoas vão enxergar como:</text:p>
      <text:p text:style-name="Text_20_body"><text:soft-page-break/>tipo<text:line-break/>Grupo Habib's<text:line-break/>Grupo Madero<text:line-break/>Grupo Outback</text:p>
      <text:p text:style-name="Text_20_body">mesmo sendo local.</text:p>
      <text:p text:style-name="Horizontal_20_Line"/>
      <text:h text:style-name="Heading_20_1" text:outline-level="1">🔥 Próximo passo mais importante:</text:h>
      <text:p text:style-name="Text_20_body">Posso criar:</text:p>
      <text:p text:style-name="Text_20_body">✅ modelo de fachada profissional<text:line-break/>✅ modelo de embalagem<text:line-break/>✅ modelo de Instagram<text:line-break/>✅ uniforme</text:p>
      <text:p text:style-name="Text_20_body">Começamos por qual?</text:p>
      <text:p text:style-name="Text_20_body">1 fachada<text:line-break/>2 embalagem<text:line-break/>3 Instagram<text:line-break/>4 uniforme</text:p>
      <text:p text:style-name="Text_20_body">1</text:p>
      <text:p text:style-name="Text_20_body">You've hit the free plan limit for image generations requests. You can create more images when the limit resets in 23 hours and 40 minutes.</text:p>
      <text:p text:style-name="Text_20_body">Assim que o limite resetar, eu crio a <text:span text:style-name="Strong_20_Emphasis">fachada profissional completa da CHARM FOOD ou Galetos Beach</text:span>, no padrão franquia, pronta para você copiar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8T20:08:44.738967200</meta:creation-date>
    <dc:date>2026-02-18T20:09:32.232301300</dc:date>
    <meta:editing-duration>PT55S</meta:editing-duration>
    <meta:editing-cycles>1</meta:editing-cycles>
    <meta:generator>LibreOffice/25.8.4.2$Windows_X86_64 LibreOffice_project/290daaa01b999472f0c7a3890eb6a550fd74c6df</meta:generator>
    <meta:document-statistic meta:table-count="1" meta:image-count="23" meta:object-count="0" meta:page-count="15" meta:paragraph-count="322" meta:word-count="1394" meta:character-count="8343" meta:non-whitespace-character-count="7313"/>
  </office:meta>
</office:document-meta>
</file>